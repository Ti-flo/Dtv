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Données">
      <style:table-properties table:display="true" style:writing-mode="lr-tb"/>
    </style:style>
    <style:style style:name="ta2" style:family="table" style:master-page-name="PageStyle_5f_Résumé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6" style:family="table-cell" style:parent-style-name="Default"/>
    <style:style style:name="ce7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b266ff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996633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ff6666"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6699ff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66cc66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cc00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ackground-color="#ffd9b3" style:diagonal-bl-tr="none" style:diagonal-tl-br="none" fo:border="0.74pt solid #000000" style:rotation-align="none"/>
    </style:style>
    <style:style style:name="ce17" style:family="table-cell" style:parent-style-name="Default">
      <style:table-cell-properties fo:background-color="#cce5ff" style:diagonal-bl-tr="none" style:diagonal-tl-br="none" fo:border="0.74pt solid #000000" style:rotation-align="none"/>
    </style:style>
    <style:style style:name="ce18" style:family="table-cell" style:parent-style-name="Default">
      <style:table-cell-properties fo:background-color="#3399ff"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66cc00"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#0066cc" style:diagonal-bl-tr="none" style:diagonal-tl-br="none" fo:border="0.74pt solid #000000" style:rotation-align="none"/>
    </style:style>
    <style:style style:name="ce21" style:family="table-cell" style:parent-style-name="Default">
      <style:table-cell-properties fo:background-color="#339900" style:diagonal-bl-tr="none" style:diagonal-tl-br="none" fo:border="0.74pt solid #000000" style:rotation-align="none"/>
    </style:style>
    <style:style style:name="ce22" style:family="table-cell" style:parent-style-name="Default">
      <style:table-cell-properties fo:background-color="#c2b280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ff9999"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99ff99" style:diagonal-bl-tr="none" style:diagonal-tl-br="none" fo:border="0.74pt solid #000000" style:rotation-align="none"/>
    </style:style>
    <style:style style:name="ce25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26" style:family="table-cell" style:parent-style-name="Default">
      <style:table-cell-properties fo:background-color="#e0b3ff" style:diagonal-bl-tr="none" style:diagonal-tl-br="none" fo:border="0.74pt solid #000000" style:rotation-align="none"/>
    </style:style>
    <style:style style:name="ce27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28" style:family="table-cell" style:parent-style-name="Default">
      <style:table-cell-properties fo:background-color="#a68a64" style:diagonal-bl-tr="none" style:diagonal-tl-br="none" fo:border="0.74pt solid #000000" style:rotation-align="none"/>
    </style:style>
    <style:style style:name="ce29" style:family="table-cell" style:parent-style-name="Default">
      <style:table-cell-properties fo:background-color="#ffcccc"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99ccff" style:diagonal-bl-tr="none" style:diagonal-tl-br="none" fo:border="0.74pt solid #000000" style:rotation-align="none"/>
    </style:style>
    <style:style style:name="ce31" style:family="table-cell" style:parent-style-name="Default">
      <style:table-cell-properties fo:background-color="#ccffcc" style:diagonal-bl-tr="none" style:diagonal-tl-br="none" fo:border="0.74pt solid #000000" style:rotation-align="none"/>
    </style:style>
    <style:style style:name="ce32" style:family="table-cell" style:parent-style-name="Default">
      <style:table-cell-properties fo:background-color="#f3d1ff" style:diagonal-bl-tr="none" style:diagonal-tl-br="none" fo:border="0.74pt solid #000000" style:rotation-align="none"/>
    </style:style>
    <style:style style:name="ce33" style:family="table-cell" style:parent-style-name="Default">
      <style:table-cell-properties fo:background-color="#ffffcc" style:diagonal-bl-tr="none" style:diagonal-tl-br="none" fo:border="0.74pt solid #000000" style:rotation-align="none"/>
    </style:style>
    <style:style style:name="ce34" style:family="table-cell" style:parent-style-name="Default">
      <style:table-cell-properties fo:background-color="#a6a6a6" style:diagonal-bl-tr="none" style:diagonal-tl-br="none" fo:border="0.74pt solid #000000" style:rotation-align="none"/>
    </style:style>
    <style:style style:name="ce35" style:family="table-cell" style:parent-style-name="Default">
      <style:table-cell-properties fo:background-color="#8c7356" style:diagonal-bl-tr="none" style:diagonal-tl-br="none" fo:border="0.74pt solid #000000" style:rotation-align="none"/>
    </style:style>
    <style:style style:name="ce36" style:family="table-cell" style:parent-style-name="Default">
      <style:table-cell-properties fo:background-color="#ffb2b2" style:diagonal-bl-tr="none" style:diagonal-tl-br="none" fo:border="0.74pt solid #000000" style:rotation-align="none"/>
    </style:style>
    <style:style style:name="ce37" style:family="table-cell" style:parent-style-name="Default">
      <style:table-cell-properties fo:background-color="#b3d9ff" style:diagonal-bl-tr="none" style:diagonal-tl-br="none" fo:border="0.74pt solid #000000" style:rotation-align="none"/>
    </style:style>
    <style:style style:name="ce38" style:family="table-cell" style:parent-style-name="Default">
      <style:table-cell-properties fo:background-color="#bfffbf" style:diagonal-bl-tr="none" style:diagonal-tl-br="none" fo:border="0.74pt solid #000000" style:rotation-align="none"/>
    </style:style>
    <style:style style:name="ce39" style:family="table-cell" style:parent-style-name="Default">
      <style:table-cell-properties fo:background-color="#333333" style:diagonal-bl-tr="none" style:diagonal-tl-br="none" fo:border="0.74pt solid #000000" style:rotation-align="none"/>
    </style:style>
    <style:style style:name="ce40" style:family="table-cell" style:parent-style-name="Default">
      <style:table-cell-properties fo:background-color="#ffd700" style:diagonal-bl-tr="none" style:diagonal-tl-br="none" fo:border="0.74pt solid #000000" style:rotation-align="none"/>
    </style:style>
    <style:style style:name="ce41" style:family="table-cell" style:parent-style-name="Default">
      <style:table-cell-properties fo:background-color="#ff4c4c" style:diagonal-bl-tr="none" style:diagonal-tl-br="none" fo:border="0.74pt solid #000000" style:rotation-align="none"/>
    </style:style>
    <style:style style:name="ce42" style:family="table-cell" style:parent-style-name="Default">
      <style:table-cell-properties fo:background-color="#99ffcc" style:diagonal-bl-tr="none" style:diagonal-tl-br="none" fo:border="0.74pt solid #000000" style:rotation-align="none"/>
    </style:style>
    <style:style style:name="ce43" style:family="table-cell" style:parent-style-name="Default">
      <style:table-cell-properties fo:background-color="#006600" style:diagonal-bl-tr="none" style:diagonal-tl-br="none" fo:border="0.74pt solid #000000" style:rotation-align="none"/>
    </style:style>
    <style:style style:name="ce44" style:family="table-cell" style:parent-style-name="Default">
      <style:table-cell-properties fo:background-color="#00cc00" style:diagonal-bl-tr="none" style:diagonal-tl-br="none" fo:border="0.74pt solid #000000" style:rotation-align="none"/>
    </style:style>
    <style:style style:name="ce45" style:family="table-cell" style:parent-style-name="Default">
      <style:table-cell-properties fo:background-color="#ffff00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nneau&quot;;&quot;Cape&quot;;&quot;Ceinture&quot;;&quot;Amulette&quot;;&quot;Bottes&quot;;&quot;Chapeau&quot;;&quot;Bouclier&quot;;&quot;Arc&quot;;&quot;Baguette&quot;;&quot;Épée&quot;;&quot;Marteau&quot;;&quot;Hache&quot;;&quot;Dague&quot;;&quot;Bâton&quot;)" table:allow-empty-cell="true" table:display-list="unsorted" table:base-cell-address="Résumé.A3">
          <table:help-message table:display="true">
            <text:p>Choisis un type d'équipement.</text:p>
          </table:help-message>
          <table:error-message table:message-type="stop" table:display="true">
            <text:p>Sélectionne un type valide.</text:p>
          </table:error-message>
        </table:content-validation>
      </table:content-validations>
      <table:table table:name="Donné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ases</text:p>
          </table:table-cell>
          <table:table-cell table:style-name="ce1" office:value-type="string" calcext:value-type="string">
            <text:p>XP</text:p>
          </table:table-cell>
          <table:table-cell table:style-name="ce1" office:value-type="string" calcext:value-type="string">
            <text:p>Coeff</text:p>
          </table:table-cell>
          <table:table-cell table:style-name="ce1" office:value-type="string" calcext:value-type="string">
            <text:p>Coût</text:p>
          </table:table-cell>
          <table:table-cell table:style-name="ce1" office:value-type="string" calcext:value-type="string">
            <text:p>Revenu</text:p>
          </table:table-cell>
          <table:table-cell table:style-name="ce1" office:value-type="string" calcext:value-type="string">
            <text:p>Bénéfice</text:p>
          </table:table-cell>
          <table:table-cell table:style-name="ce1" office:value-type="string" calcext:value-type="string">
            <text:p>Rentabilité</text:p>
          </table:table-cell>
          <table:table-cell table:style-name="ce1" office:value-type="string" calcext:value-type="string">
            <text:p>Coeff Min</text:p>
          </table:table-cell>
          <table:table-cell table:style-name="ce4" office:value-type="string" calcext:value-type="string">
            <text:p>Quantité</text:p>
          </table:table-cell>
          <table:table-cell table:style-name="ce1" office:value-type="string" calcext:value-type="string">
            <text:p>XP Total</text:p>
          </table:table-cell>
          <table:table-cell table:style-name="ce1" office:value-type="string" calcext:value-type="string">
            <text:p>Coût Total</text:p>
          </table:table-cell>
          <table:table-cell table:style-name="ce1" office:value-type="string" calcext:value-type="string">
            <text:p>Bénéfice Total</text:p>
          </table:table-cell>
          <table:table-cell table:style-name="ce1" office:value-type="string" calcext:value-type="string">
            <text:p>Revenu Total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Ine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ui</text:p>
          </table:table-cell>
          <table:table-cell table:style-name="ce1" office:value-type="string" calcext:value-type="string">
            <text:p>Prospe</text:p>
          </table:table-cell>
          <table:table-cell table:style-name="ce1" office:value-type="string" calcext:value-type="string">
            <text:p>Ini</text:p>
          </table:table-cell>
          <table:table-cell table:style-name="ce1" office:value-type="string" calcext:value-type="string">
            <text:p>Tac</text:p>
          </table:table-cell>
          <table:table-cell table:style-name="ce1" office:value-type="string" calcext:value-type="string">
            <text:p>Fui</text:p>
          </table:table-cell>
          <table:table-cell table:style-name="ce1" office:value-type="string" calcext:value-type="string">
            <text:p>Ret PA</text:p>
          </table:table-cell>
          <table:table-cell table:style-name="ce1" office:value-type="string" calcext:value-type="string">
            <text:p>Ret PM</text:p>
          </table:table-cell>
          <table:table-cell table:style-name="ce1" office:value-type="string" calcext:value-type="string">
            <text:p>Ré PA</text:p>
          </table:table-cell>
          <table:table-cell table:style-name="ce1" office:value-type="string" calcext:value-type="string">
            <text:p>Ré PM</text:p>
          </table:table-cell>
          <table:table-cell table:style-name="ce1" office:value-type="string" calcext:value-type="string">
            <text:p>Do Neutre</text:p>
          </table:table-cell>
          <table:table-cell table:style-name="ce1" office:value-type="string" calcext:value-type="string">
            <text:p>Do Terre</text:p>
          </table:table-cell>
          <table:table-cell table:style-name="ce1" office:value-type="string" calcext:value-type="string">
            <text:p>Do Feu</text:p>
          </table:table-cell>
          <table:table-cell table:style-name="ce1" office:value-type="string" calcext:value-type="string">
            <text:p>Do Eau</text:p>
          </table:table-cell>
          <table:table-cell table:style-name="ce1" office:value-type="string" calcext:value-type="string">
            <text:p>Do Air</text:p>
          </table:table-cell>
          <table:table-cell table:style-name="ce1" office:value-type="string" calcext:value-type="string">
            <text:p>Do Cri</text:p>
          </table:table-cell>
          <table:table-cell table:style-name="ce1" office:value-type="string" calcext:value-type="string">
            <text:p>Do Pou</text:p>
          </table:table-cell>
          <table:table-cell table:style-name="ce1" office:value-type="string" calcext:value-type="string">
            <text:p>Ré Neutre</text:p>
          </table:table-cell>
          <table:table-cell table:style-name="ce1" office:value-type="string" calcext:value-type="string">
            <text:p>Ré Terre</text:p>
          </table:table-cell>
          <table:table-cell table:style-name="ce1" office:value-type="string" calcext:value-type="string">
            <text:p>Ré Feu</text:p>
          </table:table-cell>
          <table:table-cell table:style-name="ce1" office:value-type="string" calcext:value-type="string">
            <text:p>Ré Eau</text:p>
          </table:table-cell>
          <table:table-cell table:style-name="ce1" office:value-type="string" calcext:value-type="string">
            <text:p>Ré Air</text:p>
          </table:table-cell>
          <table:table-cell table:style-name="ce1" office:value-type="string" calcext:value-type="string">
            <text:p>Ré Pou</text:p>
          </table:table-cell>
          <table:table-cell table:style-name="ce1" office:value-type="string" calcext:value-type="string">
            <text:p>Ré Cri</text:p>
          </table:table-cell>
          <table:table-cell table:style-name="ce1" office:value-type="string" calcext:value-type="string">
            <text:p>Re Per Neutre</text:p>
          </table:table-cell>
          <table:table-cell table:style-name="ce1" office:value-type="string" calcext:value-type="string">
            <text:p>Re Per Terre</text:p>
          </table:table-cell>
          <table:table-cell table:style-name="ce1" office:value-type="string" calcext:value-type="string">
            <text:p>Re Per Feu</text:p>
          </table:table-cell>
          <table:table-cell table:style-name="ce1" office:value-type="string" calcext:value-type="string">
            <text:p>Re Per Eau</text:p>
          </table:table-cell>
          <table:table-cell table:style-name="ce1" office:value-type="string" calcext:value-type="string">
            <text:p>Re Per Ai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Cri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Invo</text:p>
          </table:table-cell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Ga PM</text:p>
          </table:table-cell>
          <table:table-cell table:style-name="ce1" office:value-type="string" calcext:value-type="string">
            <text:p>Ga PA</text:p>
          </table:table-cell>
          <table:table-cell table:number-columns-repeated="16328"/>
        </table:table-row>
        <table:table-row table:style-name="ro1">
          <table:table-cell table:number-columns-repeated="10"/>
          <table:table-cell table:style-name="ce5"/>
          <table:table-cell table:number-columns-repeated="4"/>
          <table:table-cell table:style-name="ce7" office:value-type="float" office:value="28" calcext:value-type="float">
            <text:p>28</text:p>
          </table:table-cell>
          <table:table-cell table:style-name="ce8" office:value-type="float" office:value="22" calcext:value-type="float">
            <text:p>22</text:p>
          </table:table-cell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float" office:value="100" calcext:value-type="float">
            <text:p>100</text:p>
          </table:table-cell>
          <table:table-cell table:style-name="ce14" office:value-type="float" office:value="18" calcext:value-type="float">
            <text:p>18</text:p>
          </table:table-cell>
          <table:table-cell table:style-name="ce15" office:value-type="float" office:value="80" calcext:value-type="float">
            <text:p>80</text:p>
          </table:table-cell>
          <table:table-cell table:style-name="ce16" office:value-type="float" office:value="1100" calcext:value-type="float">
            <text:p>1100</text:p>
          </table:table-cell>
          <table:table-cell table:style-name="ce17" office:value-type="float" office:value="200" calcext:value-type="float">
            <text:p>200</text:p>
          </table:table-cell>
          <table:table-cell table:style-name="ce18" office:value-type="float" office:value="100" calcext:value-type="float">
            <text:p>100</text:p>
          </table:table-cell>
          <table:table-cell table:style-name="ce19" office:value-type="float" office:value="32" calcext:value-type="float">
            <text:p>32</text:p>
          </table:table-cell>
          <table:table-cell table:style-name="ce20" office:value-type="float" office:value="1700" calcext:value-type="float">
            <text:p>1700</text:p>
          </table:table-cell>
          <table:table-cell table:style-name="ce21" office:value-type="float" office:value="850" calcext:value-type="float">
            <text:p>850</text:p>
          </table:table-cell>
          <table:table-cell table:style-name="ce7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style-name="ce23" office:value-type="float" office:value="70" calcext:value-type="float">
            <text:p>70</text:p>
          </table:table-cell>
          <table:table-cell table:style-name="ce18" office:value-type="float" office:value="300" calcext:value-type="float">
            <text:p>300</text:p>
          </table:table-cell>
          <table:table-cell table:style-name="ce24" office:value-type="float" office:value="450" calcext:value-type="float">
            <text:p>450</text:p>
          </table:table-cell>
          <table:table-cell table:style-name="ce25" office:value-type="float" office:value="1100" calcext:value-type="float">
            <text:p>1100</text:p>
          </table:table-cell>
          <table:table-cell table:style-name="ce26" office:value-type="float" office:value="500" calcext:value-type="float">
            <text:p>500</text:p>
          </table:table-cell>
          <table:table-cell table:style-name="ce27" office:value-type="float" office:value="60" calcext:value-type="float">
            <text:p>60</text:p>
          </table:table-cell>
          <table:table-cell table:style-name="ce28" office:value-type="float" office:value="600" calcext:value-type="float">
            <text:p>600</text:p>
          </table:table-cell>
          <table:table-cell table:style-name="ce29" office:value-type="float" office:value="20" calcext:value-type="float">
            <text:p>20</text:p>
          </table:table-cell>
          <table:table-cell table:style-name="ce30" office:value-type="float" office:value="60" calcext:value-type="float">
            <text:p>60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100" calcext:value-type="float">
            <text:p>100</text:p>
          </table:table-cell>
          <table:table-cell table:style-name="ce33" office:value-type="float" office:value="900" calcext:value-type="float">
            <text:p>900</text:p>
          </table:table-cell>
          <table:table-cell table:style-name="ce34" office:value-type="float" office:value="1300" calcext:value-type="float">
            <text:p>1300</text:p>
          </table:table-cell>
          <table:table-cell table:style-name="ce35" office:value-type="float" office:value="2500" calcext:value-type="float">
            <text:p>2500</text:p>
          </table:table-cell>
          <table:table-cell table:style-name="ce36" office:value-type="float" office:value="900" calcext:value-type="float">
            <text:p>900</text:p>
          </table:table-cell>
          <table:table-cell table:style-name="ce37" office:value-type="float" office:value="1200" calcext:value-type="float">
            <text:p>1200</text:p>
          </table:table-cell>
          <table:table-cell table:style-name="ce38" office:value-type="float" office:value="1500" calcext:value-type="float">
            <text:p>1500</text:p>
          </table:table-cell>
          <table:table-cell table:style-name="ce39" office:value-type="float" office:value="110" calcext:value-type="float">
            <text:p>110</text:p>
          </table:table-cell>
          <table:table-cell table:style-name="ce40" office:value-type="float" office:value="130" calcext:value-type="float">
            <text:p>130</text:p>
          </table:table-cell>
          <table:table-cell table:style-name="ce41" office:value-type="float" office:value="50" calcext:value-type="float">
            <text:p>50</text:p>
          </table:table-cell>
          <table:table-cell table:style-name="ce42" office:value-type="float" office:value="600" calcext:value-type="float">
            <text:p>600</text:p>
          </table:table-cell>
          <table:table-cell table:style-name="ce43" office:value-type="float" office:value="5500" calcext:value-type="float">
            <text:p>5500</text:p>
          </table:table-cell>
          <table:table-cell table:style-name="ce44" office:value-type="float" office:value="70000" calcext:value-type="float">
            <text:p>70000</text:p>
          </table:table-cell>
          <table:table-cell table:style-name="ce45" office:value-type="float" office:value="90000" calcext:value-type="float">
            <text:p>90000</text:p>
          </table:table-cell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Anneau</text:p>
          </table:table-cell>
          <table:table-cell office:value-type="string" calcext:value-type="string">
            <text:p>Anneau Bouftou</text:p>
          </table:table-cell>
          <table:table-cell office:value-type="float" office:value="4" calcext:value-type="float">
            <text:p>4</text:p>
          </table:table-cell>
          <table:table-cell table:formula="of:=IF([.C3]=2;15;IF([.C3]=3;37;IF([.C3]=4;75;IF([.C3]=5;150;IF([.C3]=6;375;IF([.C3]=7;750;0))))))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8000" calcext:value-type="float">
            <text:p>28000</text:p>
          </table:table-cell>
          <table:table-cell table:formula="of:=[.P3]*28+[.Q3]*22+[.R3]*100+[.S3]*18+[.T3]*35+[.U3]*22+[.V3]*100+[.W3]*18+[.X3]*80+[.Y3]*1100+[.Z3]*200+[.AA3]*100+[.AB3]*32+[.AC3]*1700+[.AD3]*850+[.AE3]*200+[.AF3]*400+[.AG3]*70+[.AH3]*300+[.AI3]*450+[.AJ3]*1100+[.AK3]*500+[.AL3]*60+[.AM3]*600+[.AN3]*20+[.AO3]*60+[.AP3]*20+[.AQ3]*100+[.AR3]*900+[.AS3]*1300+[.AT3]*2500+[.AU3]*900+[.AV3]*1200+[.AW3]*1500+[.AX3]*110+[.AY3]*130+[.AZ3]*50+[.BA3]*600+[.BB3]*5500+[.BC3]*70000+[.BD3]*90000" office:value-type="float" office:value="15606" calcext:value-type="float">
            <text:p>15606</text:p>
          </table:table-cell>
          <table:table-cell table:style-name="ce2" table:formula="of:=[.G3]-[.F3]" office:value-type="float" office:value="-12394" calcext:value-type="float">
            <text:p>-12394</text:p>
          </table:table-cell>
          <table:table-cell table:style-name="ce3" table:formula="of:=IF([.F3]=0;&quot;&quot;;[.G3]/[.F3])" office:value-type="float" office:value="0.557357142857143" calcext:value-type="float">
            <text:p>0,557357142857143</text:p>
          </table:table-cell>
          <table:table-cell table:formula="of:=IF([.G3]=0;&quot;&quot;;[.E3]*[.F3]/[.G3])" office:value-type="float" office:value="215.301806997309" calcext:value-type="float">
            <text:p>215,301806997309</text:p>
          </table:table-cell>
          <table:table-cell table:style-name="ce5" office:value-type="float" office:value="10" calcext:value-type="float">
            <text:p>10</text:p>
          </table:table-cell>
          <table:table-cell table:formula="of:=[.D3]*[.K3]" office:value-type="float" office:value="750" calcext:value-type="float">
            <text:p>750</text:p>
          </table:table-cell>
          <table:table-cell table:formula="of:=[.F3]*[.K3]" office:value-type="float" office:value="280000" calcext:value-type="float">
            <text:p>280000</text:p>
          </table:table-cell>
          <table:table-cell table:style-name="ce6" table:formula="of:=[.H3]*[.K3]" office:value-type="float" office:value="-123940" calcext:value-type="float">
            <text:p>-123940</text:p>
          </table:table-cell>
          <table:table-cell table:formula="of:=[.G3]*[.K3]" office:value-type="float" office:value="156060" calcext:value-type="float">
            <text:p>156060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Cape</text:p>
          </table:table-cell>
          <table:table-cell office:value-type="string" calcext:value-type="string">
            <text:p>Cape Bouftou</text:p>
          </table:table-cell>
          <table:table-cell office:value-type="float" office:value="5" calcext:value-type="float">
            <text:p>5</text:p>
          </table:table-cell>
          <table:table-cell table:formula="of:=IF([.C4]=2;15;IF([.C4]=3;37;IF([.C4]=4;75;IF([.C4]=5;150;IF([.C4]=6;375;IF([.C4]=7;750;0))))))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35000" calcext:value-type="float">
            <text:p>35000</text:p>
          </table:table-cell>
          <table:table-cell table:formula="of:=[.P4]*28+[.Q4]*22+[.R4]*100+[.S4]*18+[.T4]*35+[.U4]*22+[.V4]*100+[.W4]*18+[.X4]*80+[.Y4]*1100+[.Z4]*200+[.AA4]*100+[.AB4]*32+[.AC4]*1700+[.AD4]*850+[.AE4]*200+[.AF4]*400+[.AG4]*70+[.AH4]*300+[.AI4]*450+[.AJ4]*1100+[.AK4]*500+[.AL4]*60+[.AM4]*600+[.AN4]*20+[.AO4]*60+[.AP4]*20+[.AQ4]*100+[.AR4]*900+[.AS4]*1300+[.AT4]*2500+[.AU4]*900+[.AV4]*1200+[.AW4]*1500+[.AX4]*110+[.AY4]*130+[.AZ4]*50+[.BA4]*600+[.BB4]*5500+[.BC4]*70000+[.BD4]*90000" office:value-type="float" office:value="5911" calcext:value-type="float">
            <text:p>5911</text:p>
          </table:table-cell>
          <table:table-cell table:style-name="ce2" table:formula="of:=[.G4]-[.F4]" office:value-type="float" office:value="-29089" calcext:value-type="float">
            <text:p>-29089</text:p>
          </table:table-cell>
          <table:table-cell table:style-name="ce3" table:formula="of:=IF([.F4]=0;&quot;&quot;;[.G4]/[.F4])" office:value-type="float" office:value="0.168885714285714" calcext:value-type="float">
            <text:p>0,168885714285714</text:p>
          </table:table-cell>
          <table:table-cell table:formula="of:=IF([.G4]=0;&quot;&quot;;[.E4]*[.F4]/[.G4])" office:value-type="float" office:value="1776.34917949586" calcext:value-type="float">
            <text:p>1776,34917949586</text:p>
          </table:table-cell>
          <table:table-cell table:style-name="ce5" office:value-type="float" office:value="5" calcext:value-type="float">
            <text:p>5</text:p>
          </table:table-cell>
          <table:table-cell table:formula="of:=[.D4]*[.K4]" office:value-type="float" office:value="750" calcext:value-type="float">
            <text:p>750</text:p>
          </table:table-cell>
          <table:table-cell table:formula="of:=[.F4]*[.K4]" office:value-type="float" office:value="175000" calcext:value-type="float">
            <text:p>175000</text:p>
          </table:table-cell>
          <table:table-cell table:style-name="ce6" table:formula="of:=[.H4]*[.K4]" office:value-type="float" office:value="-145445" calcext:value-type="float">
            <text:p>-145445</text:p>
          </table:table-cell>
          <table:table-cell table:formula="of:=[.G4]*[.K4]" office:value-type="float" office:value="29555" calcext:value-type="float">
            <text:p>2955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Anneau</text:p>
          </table:table-cell>
          <table:table-cell office:value-type="string" calcext:value-type="string">
            <text:p>Anneau Test</text:p>
          </table:table-cell>
          <table:table-cell office:value-type="float" office:value="4" calcext:value-type="float">
            <text:p>4</text:p>
          </table:table-cell>
          <table:table-cell table:formula="of:=IF([.C5]=2;15;IF([.C5]=3;37;IF([.C5]=4;75;IF([.C5]=5;150;IF([.C5]=6;375;IF([.C5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5]*28+[.Q5]*22+[.R5]*100+[.S5]*18+[.T5]*35+[.U5]*22+[.V5]*100+[.W5]*18+[.X5]*80+[.Y5]*1100+[.Z5]*200+[.AA5]*100+[.AB5]*32+[.AC5]*1700+[.AD5]*850+[.AE5]*200+[.AF5]*400+[.AG5]*70+[.AH5]*300+[.AI5]*450+[.AJ5]*1100+[.AK5]*500+[.AL5]*60+[.AM5]*600+[.AN5]*20+[.AO5]*60+[.AP5]*20+[.AQ5]*100+[.AR5]*900+[.AS5]*1300+[.AT5]*2500+[.AU5]*900+[.AV5]*1200+[.AW5]*1500+[.AX5]*110+[.AY5]*130+[.AZ5]*50+[.BA5]*600+[.BB5]*5500+[.BC5]*70000+[.BD5]*90000" office:value-type="float" office:value="780" calcext:value-type="float">
            <text:p>780</text:p>
          </table:table-cell>
          <table:table-cell table:style-name="ce2" table:formula="of:=[.G5]-[.F5]" office:value-type="float" office:value="-29220" calcext:value-type="float">
            <text:p>-29220</text:p>
          </table:table-cell>
          <table:table-cell table:style-name="ce3" table:formula="of:=IF([.F5]=0;&quot;&quot;;[.G5]/[.F5])" office:value-type="float" office:value="0.026" calcext:value-type="float">
            <text:p>0,026</text:p>
          </table:table-cell>
          <table:table-cell table:formula="of:=IF([.G5]=0;&quot;&quot;;[.E5]*[.F5]/[.G5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5]*[.K5]" office:value-type="float" office:value="375" calcext:value-type="float">
            <text:p>375</text:p>
          </table:table-cell>
          <table:table-cell table:formula="of:=[.F5]*[.K5]" office:value-type="float" office:value="150000" calcext:value-type="float">
            <text:p>150000</text:p>
          </table:table-cell>
          <table:table-cell table:style-name="ce6" table:formula="of:=[.H5]*[.K5]" office:value-type="float" office:value="-146100" calcext:value-type="float">
            <text:p>-146100</text:p>
          </table:table-cell>
          <table:table-cell table:formula="of:=[.G5]*[.K5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Cape</text:p>
          </table:table-cell>
          <table:table-cell office:value-type="string" calcext:value-type="string">
            <text:p>Cape Test</text:p>
          </table:table-cell>
          <table:table-cell office:value-type="float" office:value="4" calcext:value-type="float">
            <text:p>4</text:p>
          </table:table-cell>
          <table:table-cell table:formula="of:=IF([.C6]=2;15;IF([.C6]=3;37;IF([.C6]=4;75;IF([.C6]=5;150;IF([.C6]=6;375;IF([.C6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6]*28+[.Q6]*22+[.R6]*100+[.S6]*18+[.T6]*35+[.U6]*22+[.V6]*100+[.W6]*18+[.X6]*80+[.Y6]*1100+[.Z6]*200+[.AA6]*100+[.AB6]*32+[.AC6]*1700+[.AD6]*850+[.AE6]*200+[.AF6]*400+[.AG6]*70+[.AH6]*300+[.AI6]*450+[.AJ6]*1100+[.AK6]*500+[.AL6]*60+[.AM6]*600+[.AN6]*20+[.AO6]*60+[.AP6]*20+[.AQ6]*100+[.AR6]*900+[.AS6]*1300+[.AT6]*2500+[.AU6]*900+[.AV6]*1200+[.AW6]*1500+[.AX6]*110+[.AY6]*130+[.AZ6]*50+[.BA6]*600+[.BB6]*5500+[.BC6]*70000+[.BD6]*90000" office:value-type="float" office:value="780" calcext:value-type="float">
            <text:p>780</text:p>
          </table:table-cell>
          <table:table-cell table:style-name="ce2" table:formula="of:=[.G6]-[.F6]" office:value-type="float" office:value="-29220" calcext:value-type="float">
            <text:p>-29220</text:p>
          </table:table-cell>
          <table:table-cell table:style-name="ce3" table:formula="of:=IF([.F6]=0;&quot;&quot;;[.G6]/[.F6])" office:value-type="float" office:value="0.026" calcext:value-type="float">
            <text:p>0,026</text:p>
          </table:table-cell>
          <table:table-cell table:formula="of:=IF([.G6]=0;&quot;&quot;;[.E6]*[.F6]/[.G6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6]*[.K6]" office:value-type="float" office:value="375" calcext:value-type="float">
            <text:p>375</text:p>
          </table:table-cell>
          <table:table-cell table:formula="of:=[.F6]*[.K6]" office:value-type="float" office:value="150000" calcext:value-type="float">
            <text:p>150000</text:p>
          </table:table-cell>
          <table:table-cell table:style-name="ce6" table:formula="of:=[.H6]*[.K6]" office:value-type="float" office:value="-146100" calcext:value-type="float">
            <text:p>-146100</text:p>
          </table:table-cell>
          <table:table-cell table:formula="of:=[.G6]*[.K6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Ceinture</text:p>
          </table:table-cell>
          <table:table-cell office:value-type="string" calcext:value-type="string">
            <text:p>Ceinture Test</text:p>
          </table:table-cell>
          <table:table-cell office:value-type="float" office:value="4" calcext:value-type="float">
            <text:p>4</text:p>
          </table:table-cell>
          <table:table-cell table:formula="of:=IF([.C7]=2;15;IF([.C7]=3;37;IF([.C7]=4;75;IF([.C7]=5;150;IF([.C7]=6;375;IF([.C7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7]*28+[.Q7]*22+[.R7]*100+[.S7]*18+[.T7]*35+[.U7]*22+[.V7]*100+[.W7]*18+[.X7]*80+[.Y7]*1100+[.Z7]*200+[.AA7]*100+[.AB7]*32+[.AC7]*1700+[.AD7]*850+[.AE7]*200+[.AF7]*400+[.AG7]*70+[.AH7]*300+[.AI7]*450+[.AJ7]*1100+[.AK7]*500+[.AL7]*60+[.AM7]*600+[.AN7]*20+[.AO7]*60+[.AP7]*20+[.AQ7]*100+[.AR7]*900+[.AS7]*1300+[.AT7]*2500+[.AU7]*900+[.AV7]*1200+[.AW7]*1500+[.AX7]*110+[.AY7]*130+[.AZ7]*50+[.BA7]*600+[.BB7]*5500+[.BC7]*70000+[.BD7]*90000" office:value-type="float" office:value="780" calcext:value-type="float">
            <text:p>780</text:p>
          </table:table-cell>
          <table:table-cell table:style-name="ce2" table:formula="of:=[.G7]-[.F7]" office:value-type="float" office:value="-29220" calcext:value-type="float">
            <text:p>-29220</text:p>
          </table:table-cell>
          <table:table-cell table:style-name="ce3" table:formula="of:=IF([.F7]=0;&quot;&quot;;[.G7]/[.F7])" office:value-type="float" office:value="0.026" calcext:value-type="float">
            <text:p>0,026</text:p>
          </table:table-cell>
          <table:table-cell table:formula="of:=IF([.G7]=0;&quot;&quot;;[.E7]*[.F7]/[.G7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7]*[.K7]" office:value-type="float" office:value="375" calcext:value-type="float">
            <text:p>375</text:p>
          </table:table-cell>
          <table:table-cell table:formula="of:=[.F7]*[.K7]" office:value-type="float" office:value="150000" calcext:value-type="float">
            <text:p>150000</text:p>
          </table:table-cell>
          <table:table-cell table:style-name="ce6" table:formula="of:=[.H7]*[.K7]" office:value-type="float" office:value="-146100" calcext:value-type="float">
            <text:p>-146100</text:p>
          </table:table-cell>
          <table:table-cell table:formula="of:=[.G7]*[.K7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Amulette</text:p>
          </table:table-cell>
          <table:table-cell office:value-type="string" calcext:value-type="string">
            <text:p>Amulette Test</text:p>
          </table:table-cell>
          <table:table-cell office:value-type="float" office:value="4" calcext:value-type="float">
            <text:p>4</text:p>
          </table:table-cell>
          <table:table-cell table:formula="of:=IF([.C8]=2;15;IF([.C8]=3;37;IF([.C8]=4;75;IF([.C8]=5;150;IF([.C8]=6;375;IF([.C8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8]*28+[.Q8]*22+[.R8]*100+[.S8]*18+[.T8]*35+[.U8]*22+[.V8]*100+[.W8]*18+[.X8]*80+[.Y8]*1100+[.Z8]*200+[.AA8]*100+[.AB8]*32+[.AC8]*1700+[.AD8]*850+[.AE8]*200+[.AF8]*400+[.AG8]*70+[.AH8]*300+[.AI8]*450+[.AJ8]*1100+[.AK8]*500+[.AL8]*60+[.AM8]*600+[.AN8]*20+[.AO8]*60+[.AP8]*20+[.AQ8]*100+[.AR8]*900+[.AS8]*1300+[.AT8]*2500+[.AU8]*900+[.AV8]*1200+[.AW8]*1500+[.AX8]*110+[.AY8]*130+[.AZ8]*50+[.BA8]*600+[.BB8]*5500+[.BC8]*70000+[.BD8]*90000" office:value-type="float" office:value="780" calcext:value-type="float">
            <text:p>780</text:p>
          </table:table-cell>
          <table:table-cell table:style-name="ce2" table:formula="of:=[.G8]-[.F8]" office:value-type="float" office:value="-29220" calcext:value-type="float">
            <text:p>-29220</text:p>
          </table:table-cell>
          <table:table-cell table:style-name="ce3" table:formula="of:=IF([.F8]=0;&quot;&quot;;[.G8]/[.F8])" office:value-type="float" office:value="0.026" calcext:value-type="float">
            <text:p>0,026</text:p>
          </table:table-cell>
          <table:table-cell table:formula="of:=IF([.G8]=0;&quot;&quot;;[.E8]*[.F8]/[.G8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8]*[.K8]" office:value-type="float" office:value="375" calcext:value-type="float">
            <text:p>375</text:p>
          </table:table-cell>
          <table:table-cell table:formula="of:=[.F8]*[.K8]" office:value-type="float" office:value="150000" calcext:value-type="float">
            <text:p>150000</text:p>
          </table:table-cell>
          <table:table-cell table:style-name="ce6" table:formula="of:=[.H8]*[.K8]" office:value-type="float" office:value="-146100" calcext:value-type="float">
            <text:p>-146100</text:p>
          </table:table-cell>
          <table:table-cell table:formula="of:=[.G8]*[.K8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Bottes</text:p>
          </table:table-cell>
          <table:table-cell office:value-type="string" calcext:value-type="string">
            <text:p>Bottes Test</text:p>
          </table:table-cell>
          <table:table-cell office:value-type="float" office:value="4" calcext:value-type="float">
            <text:p>4</text:p>
          </table:table-cell>
          <table:table-cell table:formula="of:=IF([.C9]=2;15;IF([.C9]=3;37;IF([.C9]=4;75;IF([.C9]=5;150;IF([.C9]=6;375;IF([.C9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9]*28+[.Q9]*22+[.R9]*100+[.S9]*18+[.T9]*35+[.U9]*22+[.V9]*100+[.W9]*18+[.X9]*80+[.Y9]*1100+[.Z9]*200+[.AA9]*100+[.AB9]*32+[.AC9]*1700+[.AD9]*850+[.AE9]*200+[.AF9]*400+[.AG9]*70+[.AH9]*300+[.AI9]*450+[.AJ9]*1100+[.AK9]*500+[.AL9]*60+[.AM9]*600+[.AN9]*20+[.AO9]*60+[.AP9]*20+[.AQ9]*100+[.AR9]*900+[.AS9]*1300+[.AT9]*2500+[.AU9]*900+[.AV9]*1200+[.AW9]*1500+[.AX9]*110+[.AY9]*130+[.AZ9]*50+[.BA9]*600+[.BB9]*5500+[.BC9]*70000+[.BD9]*90000" office:value-type="float" office:value="780" calcext:value-type="float">
            <text:p>780</text:p>
          </table:table-cell>
          <table:table-cell table:style-name="ce2" table:formula="of:=[.G9]-[.F9]" office:value-type="float" office:value="-29220" calcext:value-type="float">
            <text:p>-29220</text:p>
          </table:table-cell>
          <table:table-cell table:style-name="ce3" table:formula="of:=IF([.F9]=0;&quot;&quot;;[.G9]/[.F9])" office:value-type="float" office:value="0.026" calcext:value-type="float">
            <text:p>0,026</text:p>
          </table:table-cell>
          <table:table-cell table:formula="of:=IF([.G9]=0;&quot;&quot;;[.E9]*[.F9]/[.G9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9]*[.K9]" office:value-type="float" office:value="375" calcext:value-type="float">
            <text:p>375</text:p>
          </table:table-cell>
          <table:table-cell table:formula="of:=[.F9]*[.K9]" office:value-type="float" office:value="150000" calcext:value-type="float">
            <text:p>150000</text:p>
          </table:table-cell>
          <table:table-cell table:style-name="ce6" table:formula="of:=[.H9]*[.K9]" office:value-type="float" office:value="-146100" calcext:value-type="float">
            <text:p>-146100</text:p>
          </table:table-cell>
          <table:table-cell table:formula="of:=[.G9]*[.K9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Chapeau</text:p>
          </table:table-cell>
          <table:table-cell office:value-type="string" calcext:value-type="string">
            <text:p>Chapeau Test</text:p>
          </table:table-cell>
          <table:table-cell office:value-type="float" office:value="4" calcext:value-type="float">
            <text:p>4</text:p>
          </table:table-cell>
          <table:table-cell table:formula="of:=IF([.C10]=2;15;IF([.C10]=3;37;IF([.C10]=4;75;IF([.C10]=5;150;IF([.C10]=6;375;IF([.C10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10]*28+[.Q10]*22+[.R10]*100+[.S10]*18+[.T10]*35+[.U10]*22+[.V10]*100+[.W10]*18+[.X10]*80+[.Y10]*1100+[.Z10]*200+[.AA10]*100+[.AB10]*32+[.AC10]*1700+[.AD10]*850+[.AE10]*200+[.AF10]*400+[.AG10]*70+[.AH10]*300+[.AI10]*450+[.AJ10]*1100+[.AK10]*500+[.AL10]*60+[.AM10]*600+[.AN10]*20+[.AO10]*60+[.AP10]*20+[.AQ10]*100+[.AR10]*900+[.AS10]*1300+[.AT10]*2500+[.AU10]*900+[.AV10]*1200+[.AW10]*1500+[.AX10]*110+[.AY10]*130+[.AZ10]*50+[.BA10]*600+[.BB10]*5500+[.BC10]*70000+[.BD10]*90000" office:value-type="float" office:value="780" calcext:value-type="float">
            <text:p>780</text:p>
          </table:table-cell>
          <table:table-cell table:style-name="ce2" table:formula="of:=[.G10]-[.F10]" office:value-type="float" office:value="-29220" calcext:value-type="float">
            <text:p>-29220</text:p>
          </table:table-cell>
          <table:table-cell table:style-name="ce3" table:formula="of:=IF([.F10]=0;&quot;&quot;;[.G10]/[.F10])" office:value-type="float" office:value="0.026" calcext:value-type="float">
            <text:p>0,026</text:p>
          </table:table-cell>
          <table:table-cell table:formula="of:=IF([.G10]=0;&quot;&quot;;[.E10]*[.F10]/[.G10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10]*[.K10]" office:value-type="float" office:value="375" calcext:value-type="float">
            <text:p>375</text:p>
          </table:table-cell>
          <table:table-cell table:formula="of:=[.F10]*[.K10]" office:value-type="float" office:value="150000" calcext:value-type="float">
            <text:p>150000</text:p>
          </table:table-cell>
          <table:table-cell table:style-name="ce6" table:formula="of:=[.H10]*[.K10]" office:value-type="float" office:value="-146100" calcext:value-type="float">
            <text:p>-146100</text:p>
          </table:table-cell>
          <table:table-cell table:formula="of:=[.G10]*[.K10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Bouclier</text:p>
          </table:table-cell>
          <table:table-cell office:value-type="string" calcext:value-type="string">
            <text:p>Bouclier Test</text:p>
          </table:table-cell>
          <table:table-cell office:value-type="float" office:value="4" calcext:value-type="float">
            <text:p>4</text:p>
          </table:table-cell>
          <table:table-cell table:formula="of:=IF([.C11]=2;15;IF([.C11]=3;37;IF([.C11]=4;75;IF([.C11]=5;150;IF([.C11]=6;375;IF([.C11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11]*28+[.Q11]*22+[.R11]*100+[.S11]*18+[.T11]*35+[.U11]*22+[.V11]*100+[.W11]*18+[.X11]*80+[.Y11]*1100+[.Z11]*200+[.AA11]*100+[.AB11]*32+[.AC11]*1700+[.AD11]*850+[.AE11]*200+[.AF11]*400+[.AG11]*70+[.AH11]*300+[.AI11]*450+[.AJ11]*1100+[.AK11]*500+[.AL11]*60+[.AM11]*600+[.AN11]*20+[.AO11]*60+[.AP11]*20+[.AQ11]*100+[.AR11]*900+[.AS11]*1300+[.AT11]*2500+[.AU11]*900+[.AV11]*1200+[.AW11]*1500+[.AX11]*110+[.AY11]*130+[.AZ11]*50+[.BA11]*600+[.BB11]*5500+[.BC11]*70000+[.BD11]*90000" office:value-type="float" office:value="780" calcext:value-type="float">
            <text:p>780</text:p>
          </table:table-cell>
          <table:table-cell table:style-name="ce2" table:formula="of:=[.G11]-[.F11]" office:value-type="float" office:value="-29220" calcext:value-type="float">
            <text:p>-29220</text:p>
          </table:table-cell>
          <table:table-cell table:style-name="ce3" table:formula="of:=IF([.F11]=0;&quot;&quot;;[.G11]/[.F11])" office:value-type="float" office:value="0.026" calcext:value-type="float">
            <text:p>0,026</text:p>
          </table:table-cell>
          <table:table-cell table:formula="of:=IF([.G11]=0;&quot;&quot;;[.E11]*[.F11]/[.G11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11]*[.K11]" office:value-type="float" office:value="375" calcext:value-type="float">
            <text:p>375</text:p>
          </table:table-cell>
          <table:table-cell table:formula="of:=[.F11]*[.K11]" office:value-type="float" office:value="150000" calcext:value-type="float">
            <text:p>150000</text:p>
          </table:table-cell>
          <table:table-cell table:style-name="ce6" table:formula="of:=[.H11]*[.K11]" office:value-type="float" office:value="-146100" calcext:value-type="float">
            <text:p>-146100</text:p>
          </table:table-cell>
          <table:table-cell table:formula="of:=[.G11]*[.K11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Arc</text:p>
          </table:table-cell>
          <table:table-cell office:value-type="string" calcext:value-type="string">
            <text:p>Arc Test</text:p>
          </table:table-cell>
          <table:table-cell office:value-type="float" office:value="4" calcext:value-type="float">
            <text:p>4</text:p>
          </table:table-cell>
          <table:table-cell table:formula="of:=IF([.C12]=2;15;IF([.C12]=3;37;IF([.C12]=4;75;IF([.C12]=5;150;IF([.C12]=6;375;IF([.C12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12]*28+[.Q12]*22+[.R12]*100+[.S12]*18+[.T12]*35+[.U12]*22+[.V12]*100+[.W12]*18+[.X12]*80+[.Y12]*1100+[.Z12]*200+[.AA12]*100+[.AB12]*32+[.AC12]*1700+[.AD12]*850+[.AE12]*200+[.AF12]*400+[.AG12]*70+[.AH12]*300+[.AI12]*450+[.AJ12]*1100+[.AK12]*500+[.AL12]*60+[.AM12]*600+[.AN12]*20+[.AO12]*60+[.AP12]*20+[.AQ12]*100+[.AR12]*900+[.AS12]*1300+[.AT12]*2500+[.AU12]*900+[.AV12]*1200+[.AW12]*1500+[.AX12]*110+[.AY12]*130+[.AZ12]*50+[.BA12]*600+[.BB12]*5500+[.BC12]*70000+[.BD12]*90000" office:value-type="float" office:value="780" calcext:value-type="float">
            <text:p>780</text:p>
          </table:table-cell>
          <table:table-cell table:style-name="ce2" table:formula="of:=[.G12]-[.F12]" office:value-type="float" office:value="-29220" calcext:value-type="float">
            <text:p>-29220</text:p>
          </table:table-cell>
          <table:table-cell table:style-name="ce3" table:formula="of:=IF([.F12]=0;&quot;&quot;;[.G12]/[.F12])" office:value-type="float" office:value="0.026" calcext:value-type="float">
            <text:p>0,026</text:p>
          </table:table-cell>
          <table:table-cell table:formula="of:=IF([.G12]=0;&quot;&quot;;[.E12]*[.F12]/[.G12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12]*[.K12]" office:value-type="float" office:value="375" calcext:value-type="float">
            <text:p>375</text:p>
          </table:table-cell>
          <table:table-cell table:formula="of:=[.F12]*[.K12]" office:value-type="float" office:value="150000" calcext:value-type="float">
            <text:p>150000</text:p>
          </table:table-cell>
          <table:table-cell table:style-name="ce6" table:formula="of:=[.H12]*[.K12]" office:value-type="float" office:value="-146100" calcext:value-type="float">
            <text:p>-146100</text:p>
          </table:table-cell>
          <table:table-cell table:formula="of:=[.G12]*[.K12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Baguette</text:p>
          </table:table-cell>
          <table:table-cell office:value-type="string" calcext:value-type="string">
            <text:p>Baguette Test</text:p>
          </table:table-cell>
          <table:table-cell office:value-type="float" office:value="4" calcext:value-type="float">
            <text:p>4</text:p>
          </table:table-cell>
          <table:table-cell table:formula="of:=IF([.C13]=2;15;IF([.C13]=3;37;IF([.C13]=4;75;IF([.C13]=5;150;IF([.C13]=6;375;IF([.C13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13]*28+[.Q13]*22+[.R13]*100+[.S13]*18+[.T13]*35+[.U13]*22+[.V13]*100+[.W13]*18+[.X13]*80+[.Y13]*1100+[.Z13]*200+[.AA13]*100+[.AB13]*32+[.AC13]*1700+[.AD13]*850+[.AE13]*200+[.AF13]*400+[.AG13]*70+[.AH13]*300+[.AI13]*450+[.AJ13]*1100+[.AK13]*500+[.AL13]*60+[.AM13]*600+[.AN13]*20+[.AO13]*60+[.AP13]*20+[.AQ13]*100+[.AR13]*900+[.AS13]*1300+[.AT13]*2500+[.AU13]*900+[.AV13]*1200+[.AW13]*1500+[.AX13]*110+[.AY13]*130+[.AZ13]*50+[.BA13]*600+[.BB13]*5500+[.BC13]*70000+[.BD13]*90000" office:value-type="float" office:value="780" calcext:value-type="float">
            <text:p>780</text:p>
          </table:table-cell>
          <table:table-cell table:style-name="ce2" table:formula="of:=[.G13]-[.F13]" office:value-type="float" office:value="-29220" calcext:value-type="float">
            <text:p>-29220</text:p>
          </table:table-cell>
          <table:table-cell table:style-name="ce3" table:formula="of:=IF([.F13]=0;&quot;&quot;;[.G13]/[.F13])" office:value-type="float" office:value="0.026" calcext:value-type="float">
            <text:p>0,026</text:p>
          </table:table-cell>
          <table:table-cell table:formula="of:=IF([.G13]=0;&quot;&quot;;[.E13]*[.F13]/[.G13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13]*[.K13]" office:value-type="float" office:value="375" calcext:value-type="float">
            <text:p>375</text:p>
          </table:table-cell>
          <table:table-cell table:formula="of:=[.F13]*[.K13]" office:value-type="float" office:value="150000" calcext:value-type="float">
            <text:p>150000</text:p>
          </table:table-cell>
          <table:table-cell table:style-name="ce6" table:formula="of:=[.H13]*[.K13]" office:value-type="float" office:value="-146100" calcext:value-type="float">
            <text:p>-146100</text:p>
          </table:table-cell>
          <table:table-cell table:formula="of:=[.G13]*[.K13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Épée</text:p>
          </table:table-cell>
          <table:table-cell office:value-type="string" calcext:value-type="string">
            <text:p>Épée Test</text:p>
          </table:table-cell>
          <table:table-cell office:value-type="float" office:value="4" calcext:value-type="float">
            <text:p>4</text:p>
          </table:table-cell>
          <table:table-cell table:formula="of:=IF([.C14]=2;15;IF([.C14]=3;37;IF([.C14]=4;75;IF([.C14]=5;150;IF([.C14]=6;375;IF([.C14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14]*28+[.Q14]*22+[.R14]*100+[.S14]*18+[.T14]*35+[.U14]*22+[.V14]*100+[.W14]*18+[.X14]*80+[.Y14]*1100+[.Z14]*200+[.AA14]*100+[.AB14]*32+[.AC14]*1700+[.AD14]*850+[.AE14]*200+[.AF14]*400+[.AG14]*70+[.AH14]*300+[.AI14]*450+[.AJ14]*1100+[.AK14]*500+[.AL14]*60+[.AM14]*600+[.AN14]*20+[.AO14]*60+[.AP14]*20+[.AQ14]*100+[.AR14]*900+[.AS14]*1300+[.AT14]*2500+[.AU14]*900+[.AV14]*1200+[.AW14]*1500+[.AX14]*110+[.AY14]*130+[.AZ14]*50+[.BA14]*600+[.BB14]*5500+[.BC14]*70000+[.BD14]*90000" office:value-type="float" office:value="780" calcext:value-type="float">
            <text:p>780</text:p>
          </table:table-cell>
          <table:table-cell table:style-name="ce2" table:formula="of:=[.G14]-[.F14]" office:value-type="float" office:value="-29220" calcext:value-type="float">
            <text:p>-29220</text:p>
          </table:table-cell>
          <table:table-cell table:style-name="ce3" table:formula="of:=IF([.F14]=0;&quot;&quot;;[.G14]/[.F14])" office:value-type="float" office:value="0.026" calcext:value-type="float">
            <text:p>0,026</text:p>
          </table:table-cell>
          <table:table-cell table:formula="of:=IF([.G14]=0;&quot;&quot;;[.E14]*[.F14]/[.G14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14]*[.K14]" office:value-type="float" office:value="375" calcext:value-type="float">
            <text:p>375</text:p>
          </table:table-cell>
          <table:table-cell table:formula="of:=[.F14]*[.K14]" office:value-type="float" office:value="150000" calcext:value-type="float">
            <text:p>150000</text:p>
          </table:table-cell>
          <table:table-cell table:style-name="ce6" table:formula="of:=[.H14]*[.K14]" office:value-type="float" office:value="-146100" calcext:value-type="float">
            <text:p>-146100</text:p>
          </table:table-cell>
          <table:table-cell table:formula="of:=[.G14]*[.K14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Marteau</text:p>
          </table:table-cell>
          <table:table-cell office:value-type="string" calcext:value-type="string">
            <text:p>Marteau Test</text:p>
          </table:table-cell>
          <table:table-cell office:value-type="float" office:value="4" calcext:value-type="float">
            <text:p>4</text:p>
          </table:table-cell>
          <table:table-cell table:formula="of:=IF([.C15]=2;15;IF([.C15]=3;37;IF([.C15]=4;75;IF([.C15]=5;150;IF([.C15]=6;375;IF([.C15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15]*28+[.Q15]*22+[.R15]*100+[.S15]*18+[.T15]*35+[.U15]*22+[.V15]*100+[.W15]*18+[.X15]*80+[.Y15]*1100+[.Z15]*200+[.AA15]*100+[.AB15]*32+[.AC15]*1700+[.AD15]*850+[.AE15]*200+[.AF15]*400+[.AG15]*70+[.AH15]*300+[.AI15]*450+[.AJ15]*1100+[.AK15]*500+[.AL15]*60+[.AM15]*600+[.AN15]*20+[.AO15]*60+[.AP15]*20+[.AQ15]*100+[.AR15]*900+[.AS15]*1300+[.AT15]*2500+[.AU15]*900+[.AV15]*1200+[.AW15]*1500+[.AX15]*110+[.AY15]*130+[.AZ15]*50+[.BA15]*600+[.BB15]*5500+[.BC15]*70000+[.BD15]*90000" office:value-type="float" office:value="780" calcext:value-type="float">
            <text:p>780</text:p>
          </table:table-cell>
          <table:table-cell table:style-name="ce2" table:formula="of:=[.G15]-[.F15]" office:value-type="float" office:value="-29220" calcext:value-type="float">
            <text:p>-29220</text:p>
          </table:table-cell>
          <table:table-cell table:style-name="ce3" table:formula="of:=IF([.F15]=0;&quot;&quot;;[.G15]/[.F15])" office:value-type="float" office:value="0.026" calcext:value-type="float">
            <text:p>0,026</text:p>
          </table:table-cell>
          <table:table-cell table:formula="of:=IF([.G15]=0;&quot;&quot;;[.E15]*[.F15]/[.G15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15]*[.K15]" office:value-type="float" office:value="375" calcext:value-type="float">
            <text:p>375</text:p>
          </table:table-cell>
          <table:table-cell table:formula="of:=[.F15]*[.K15]" office:value-type="float" office:value="150000" calcext:value-type="float">
            <text:p>150000</text:p>
          </table:table-cell>
          <table:table-cell table:style-name="ce6" table:formula="of:=[.H15]*[.K15]" office:value-type="float" office:value="-146100" calcext:value-type="float">
            <text:p>-146100</text:p>
          </table:table-cell>
          <table:table-cell table:formula="of:=[.G15]*[.K15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Hache</text:p>
          </table:table-cell>
          <table:table-cell office:value-type="string" calcext:value-type="string">
            <text:p>Hache Test</text:p>
          </table:table-cell>
          <table:table-cell office:value-type="float" office:value="4" calcext:value-type="float">
            <text:p>4</text:p>
          </table:table-cell>
          <table:table-cell table:formula="of:=IF([.C16]=2;15;IF([.C16]=3;37;IF([.C16]=4;75;IF([.C16]=5;150;IF([.C16]=6;375;IF([.C16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16]*28+[.Q16]*22+[.R16]*100+[.S16]*18+[.T16]*35+[.U16]*22+[.V16]*100+[.W16]*18+[.X16]*80+[.Y16]*1100+[.Z16]*200+[.AA16]*100+[.AB16]*32+[.AC16]*1700+[.AD16]*850+[.AE16]*200+[.AF16]*400+[.AG16]*70+[.AH16]*300+[.AI16]*450+[.AJ16]*1100+[.AK16]*500+[.AL16]*60+[.AM16]*600+[.AN16]*20+[.AO16]*60+[.AP16]*20+[.AQ16]*100+[.AR16]*900+[.AS16]*1300+[.AT16]*2500+[.AU16]*900+[.AV16]*1200+[.AW16]*1500+[.AX16]*110+[.AY16]*130+[.AZ16]*50+[.BA16]*600+[.BB16]*5500+[.BC16]*70000+[.BD16]*90000" office:value-type="float" office:value="780" calcext:value-type="float">
            <text:p>780</text:p>
          </table:table-cell>
          <table:table-cell table:style-name="ce2" table:formula="of:=[.G16]-[.F16]" office:value-type="float" office:value="-29220" calcext:value-type="float">
            <text:p>-29220</text:p>
          </table:table-cell>
          <table:table-cell table:style-name="ce3" table:formula="of:=IF([.F16]=0;&quot;&quot;;[.G16]/[.F16])" office:value-type="float" office:value="0.026" calcext:value-type="float">
            <text:p>0,026</text:p>
          </table:table-cell>
          <table:table-cell table:formula="of:=IF([.G16]=0;&quot;&quot;;[.E16]*[.F16]/[.G16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16]*[.K16]" office:value-type="float" office:value="375" calcext:value-type="float">
            <text:p>375</text:p>
          </table:table-cell>
          <table:table-cell table:formula="of:=[.F16]*[.K16]" office:value-type="float" office:value="150000" calcext:value-type="float">
            <text:p>150000</text:p>
          </table:table-cell>
          <table:table-cell table:style-name="ce6" table:formula="of:=[.H16]*[.K16]" office:value-type="float" office:value="-146100" calcext:value-type="float">
            <text:p>-146100</text:p>
          </table:table-cell>
          <table:table-cell table:formula="of:=[.G16]*[.K16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Dague</text:p>
          </table:table-cell>
          <table:table-cell office:value-type="string" calcext:value-type="string">
            <text:p>Dague Test</text:p>
          </table:table-cell>
          <table:table-cell office:value-type="float" office:value="4" calcext:value-type="float">
            <text:p>4</text:p>
          </table:table-cell>
          <table:table-cell table:formula="of:=IF([.C17]=2;15;IF([.C17]=3;37;IF([.C17]=4;75;IF([.C17]=5;150;IF([.C17]=6;375;IF([.C17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17]*28+[.Q17]*22+[.R17]*100+[.S17]*18+[.T17]*35+[.U17]*22+[.V17]*100+[.W17]*18+[.X17]*80+[.Y17]*1100+[.Z17]*200+[.AA17]*100+[.AB17]*32+[.AC17]*1700+[.AD17]*850+[.AE17]*200+[.AF17]*400+[.AG17]*70+[.AH17]*300+[.AI17]*450+[.AJ17]*1100+[.AK17]*500+[.AL17]*60+[.AM17]*600+[.AN17]*20+[.AO17]*60+[.AP17]*20+[.AQ17]*100+[.AR17]*900+[.AS17]*1300+[.AT17]*2500+[.AU17]*900+[.AV17]*1200+[.AW17]*1500+[.AX17]*110+[.AY17]*130+[.AZ17]*50+[.BA17]*600+[.BB17]*5500+[.BC17]*70000+[.BD17]*90000" office:value-type="float" office:value="780" calcext:value-type="float">
            <text:p>780</text:p>
          </table:table-cell>
          <table:table-cell table:style-name="ce2" table:formula="of:=[.G17]-[.F17]" office:value-type="float" office:value="-29220" calcext:value-type="float">
            <text:p>-29220</text:p>
          </table:table-cell>
          <table:table-cell table:style-name="ce3" table:formula="of:=IF([.F17]=0;&quot;&quot;;[.G17]/[.F17])" office:value-type="float" office:value="0.026" calcext:value-type="float">
            <text:p>0,026</text:p>
          </table:table-cell>
          <table:table-cell table:formula="of:=IF([.G17]=0;&quot;&quot;;[.E17]*[.F17]/[.G17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17]*[.K17]" office:value-type="float" office:value="375" calcext:value-type="float">
            <text:p>375</text:p>
          </table:table-cell>
          <table:table-cell table:formula="of:=[.F17]*[.K17]" office:value-type="float" office:value="150000" calcext:value-type="float">
            <text:p>150000</text:p>
          </table:table-cell>
          <table:table-cell table:style-name="ce6" table:formula="of:=[.H17]*[.K17]" office:value-type="float" office:value="-146100" calcext:value-type="float">
            <text:p>-146100</text:p>
          </table:table-cell>
          <table:table-cell table:formula="of:=[.G17]*[.K17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 office:value-type="string" calcext:value-type="string">
            <text:p>Bâton</text:p>
          </table:table-cell>
          <table:table-cell office:value-type="string" calcext:value-type="string">
            <text:p>Bâton Test</text:p>
          </table:table-cell>
          <table:table-cell office:value-type="float" office:value="4" calcext:value-type="float">
            <text:p>4</text:p>
          </table:table-cell>
          <table:table-cell table:formula="of:=IF([.C18]=2;15;IF([.C18]=3;37;IF([.C18]=4;75;IF([.C18]=5;150;IF([.C18]=6;375;IF([.C18]=7;750;0))))))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table:formula="of:=[.P18]*28+[.Q18]*22+[.R18]*100+[.S18]*18+[.T18]*35+[.U18]*22+[.V18]*100+[.W18]*18+[.X18]*80+[.Y18]*1100+[.Z18]*200+[.AA18]*100+[.AB18]*32+[.AC18]*1700+[.AD18]*850+[.AE18]*200+[.AF18]*400+[.AG18]*70+[.AH18]*300+[.AI18]*450+[.AJ18]*1100+[.AK18]*500+[.AL18]*60+[.AM18]*600+[.AN18]*20+[.AO18]*60+[.AP18]*20+[.AQ18]*100+[.AR18]*900+[.AS18]*1300+[.AT18]*2500+[.AU18]*900+[.AV18]*1200+[.AW18]*1500+[.AX18]*110+[.AY18]*130+[.AZ18]*50+[.BA18]*600+[.BB18]*5500+[.BC18]*70000+[.BD18]*90000" office:value-type="float" office:value="780" calcext:value-type="float">
            <text:p>780</text:p>
          </table:table-cell>
          <table:table-cell table:style-name="ce2" table:formula="of:=[.G18]-[.F18]" office:value-type="float" office:value="-29220" calcext:value-type="float">
            <text:p>-29220</text:p>
          </table:table-cell>
          <table:table-cell table:style-name="ce3" table:formula="of:=IF([.F18]=0;&quot;&quot;;[.G18]/[.F18])" office:value-type="float" office:value="0.026" calcext:value-type="float">
            <text:p>0,026</text:p>
          </table:table-cell>
          <table:table-cell table:formula="of:=IF([.G18]=0;&quot;&quot;;[.E18]*[.F18]/[.G18])" office:value-type="float" office:value="7692.30769230769" calcext:value-type="float">
            <text:p>7692,30769230769</text:p>
          </table:table-cell>
          <table:table-cell table:style-name="ce5" office:value-type="float" office:value="5" calcext:value-type="float">
            <text:p>5</text:p>
          </table:table-cell>
          <table:table-cell table:formula="of:=[.D18]*[.K18]" office:value-type="float" office:value="375" calcext:value-type="float">
            <text:p>375</text:p>
          </table:table-cell>
          <table:table-cell table:formula="of:=[.F18]*[.K18]" office:value-type="float" office:value="150000" calcext:value-type="float">
            <text:p>150000</text:p>
          </table:table-cell>
          <table:table-cell table:style-name="ce6" table:formula="of:=[.H18]*[.K18]" office:value-type="float" office:value="-146100" calcext:value-type="float">
            <text:p>-146100</text:p>
          </table:table-cell>
          <table:table-cell table:formula="of:=[.G18]*[.K18]" office:value-type="float" office:value="3900" calcext:value-type="float">
            <text:p>3900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content-validation-name="val1"/>
          <table:table-cell table:number-columns-repeated="2"/>
          <table:table-cell table:formula="of:=IF([.C19]=2;15;IF([.C19]=3;37;IF([.C19]=4;75;IF([.C19]=5;150;IF([.C19]=6;375;IF([.C19]=7;750;0))))))" office:value-type="float" office:value="0" calcext:value-type="float">
            <text:p>0</text:p>
          </table:table-cell>
          <table:table-cell table:number-columns-repeated="2"/>
          <table:table-cell table:formula="of:=[.P19]*28+[.Q19]*22+[.R19]*100+[.S19]*18+[.T19]*35+[.U19]*22+[.V19]*100+[.W19]*18+[.X19]*80+[.Y19]*1100+[.Z19]*200+[.AA19]*100+[.AB19]*32+[.AC19]*1700+[.AD19]*850+[.AE19]*200+[.AF19]*400+[.AG19]*70+[.AH19]*300+[.AI19]*450+[.AJ19]*1100+[.AK19]*500+[.AL19]*60+[.AM19]*600+[.AN19]*20+[.AO19]*60+[.AP19]*20+[.AQ19]*100+[.AR19]*900+[.AS19]*1300+[.AT19]*2500+[.AU19]*900+[.AV19]*1200+[.AW19]*1500+[.AX19]*110+[.AY19]*130+[.AZ19]*50+[.BA19]*600+[.BB19]*5500+[.BC19]*70000+[.BD19]*90000" office:value-type="float" office:value="0" calcext:value-type="float">
            <text:p>0</text:p>
          </table:table-cell>
          <table:table-cell table:style-name="ce2" table:formula="of:=[.G19]-[.F19]" office:value-type="float" office:value="0" calcext:value-type="float">
            <text:p>0</text:p>
          </table:table-cell>
          <table:table-cell table:style-name="ce3" table:formula="of:=IF([.F19]=0;&quot;&quot;;[.G19]/[.F19])">
            <text:p/>
          </table:table-cell>
          <table:table-cell table:formula="of:=IF([.G19]=0;&quot;&quot;;[.E19]*[.F19]/[.G19])">
            <text:p/>
          </table:table-cell>
          <table:table-cell table:style-name="ce5"/>
          <table:table-cell table:formula="of:=[.D19]*[.K19]" office:value-type="float" office:value="0" calcext:value-type="float">
            <text:p>0</text:p>
          </table:table-cell>
          <table:table-cell table:formula="of:=[.F19]*[.K19]" office:value-type="float" office:value="0" calcext:value-type="float">
            <text:p>0</text:p>
          </table:table-cell>
          <table:table-cell table:style-name="ce6" table:formula="of:=[.H19]*[.K19]" office:value-type="float" office:value="0" calcext:value-type="float">
            <text:p>0</text:p>
          </table:table-cell>
          <table:table-cell table:formula="of:=[.G19]*[.K19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0]=2;15;IF([.C20]=3;37;IF([.C20]=4;75;IF([.C20]=5;150;IF([.C20]=6;375;IF([.C20]=7;750;0))))))" office:value-type="float" office:value="0" calcext:value-type="float">
            <text:p>0</text:p>
          </table:table-cell>
          <table:table-cell table:number-columns-repeated="2"/>
          <table:table-cell table:formula="of:=[.P20]*28+[.Q20]*22+[.R20]*100+[.S20]*18+[.T20]*35+[.U20]*22+[.V20]*100+[.W20]*18+[.X20]*80+[.Y20]*1100+[.Z20]*200+[.AA20]*100+[.AB20]*32+[.AC20]*1700+[.AD20]*850+[.AE20]*200+[.AF20]*400+[.AG20]*70+[.AH20]*300+[.AI20]*450+[.AJ20]*1100+[.AK20]*500+[.AL20]*60+[.AM20]*600+[.AN20]*20+[.AO20]*60+[.AP20]*20+[.AQ20]*100+[.AR20]*900+[.AS20]*1300+[.AT20]*2500+[.AU20]*900+[.AV20]*1200+[.AW20]*1500+[.AX20]*110+[.AY20]*130+[.AZ20]*50+[.BA20]*600+[.BB20]*5500+[.BC20]*70000+[.BD20]*90000" office:value-type="float" office:value="0" calcext:value-type="float">
            <text:p>0</text:p>
          </table:table-cell>
          <table:table-cell table:style-name="ce2" table:formula="of:=[.G20]-[.F20]" office:value-type="float" office:value="0" calcext:value-type="float">
            <text:p>0</text:p>
          </table:table-cell>
          <table:table-cell table:style-name="ce3" table:formula="of:=IF([.F20]=0;&quot;&quot;;[.G20]/[.F20])">
            <text:p/>
          </table:table-cell>
          <table:table-cell table:formula="of:=IF([.G20]=0;&quot;&quot;;[.E20]*[.F20]/[.G20])">
            <text:p/>
          </table:table-cell>
          <table:table-cell table:style-name="ce5"/>
          <table:table-cell table:formula="of:=[.D20]*[.K20]" office:value-type="float" office:value="0" calcext:value-type="float">
            <text:p>0</text:p>
          </table:table-cell>
          <table:table-cell table:formula="of:=[.F20]*[.K20]" office:value-type="float" office:value="0" calcext:value-type="float">
            <text:p>0</text:p>
          </table:table-cell>
          <table:table-cell table:style-name="ce6" table:formula="of:=[.H20]*[.K20]" office:value-type="float" office:value="0" calcext:value-type="float">
            <text:p>0</text:p>
          </table:table-cell>
          <table:table-cell table:formula="of:=[.G20]*[.K20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1]=2;15;IF([.C21]=3;37;IF([.C21]=4;75;IF([.C21]=5;150;IF([.C21]=6;375;IF([.C21]=7;750;0))))))" office:value-type="float" office:value="0" calcext:value-type="float">
            <text:p>0</text:p>
          </table:table-cell>
          <table:table-cell table:number-columns-repeated="2"/>
          <table:table-cell table:formula="of:=[.P21]*28+[.Q21]*22+[.R21]*100+[.S21]*18+[.T21]*35+[.U21]*22+[.V21]*100+[.W21]*18+[.X21]*80+[.Y21]*1100+[.Z21]*200+[.AA21]*100+[.AB21]*32+[.AC21]*1700+[.AD21]*850+[.AE21]*200+[.AF21]*400+[.AG21]*70+[.AH21]*300+[.AI21]*450+[.AJ21]*1100+[.AK21]*500+[.AL21]*60+[.AM21]*600+[.AN21]*20+[.AO21]*60+[.AP21]*20+[.AQ21]*100+[.AR21]*900+[.AS21]*1300+[.AT21]*2500+[.AU21]*900+[.AV21]*1200+[.AW21]*1500+[.AX21]*110+[.AY21]*130+[.AZ21]*50+[.BA21]*600+[.BB21]*5500+[.BC21]*70000+[.BD21]*90000" office:value-type="float" office:value="0" calcext:value-type="float">
            <text:p>0</text:p>
          </table:table-cell>
          <table:table-cell table:style-name="ce2" table:formula="of:=[.G21]-[.F21]" office:value-type="float" office:value="0" calcext:value-type="float">
            <text:p>0</text:p>
          </table:table-cell>
          <table:table-cell table:style-name="ce3" table:formula="of:=IF([.F21]=0;&quot;&quot;;[.G21]/[.F21])">
            <text:p/>
          </table:table-cell>
          <table:table-cell table:formula="of:=IF([.G21]=0;&quot;&quot;;[.E21]*[.F21]/[.G21])">
            <text:p/>
          </table:table-cell>
          <table:table-cell table:style-name="ce5"/>
          <table:table-cell table:formula="of:=[.D21]*[.K21]" office:value-type="float" office:value="0" calcext:value-type="float">
            <text:p>0</text:p>
          </table:table-cell>
          <table:table-cell table:formula="of:=[.F21]*[.K21]" office:value-type="float" office:value="0" calcext:value-type="float">
            <text:p>0</text:p>
          </table:table-cell>
          <table:table-cell table:style-name="ce6" table:formula="of:=[.H21]*[.K21]" office:value-type="float" office:value="0" calcext:value-type="float">
            <text:p>0</text:p>
          </table:table-cell>
          <table:table-cell table:formula="of:=[.G21]*[.K21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2]=2;15;IF([.C22]=3;37;IF([.C22]=4;75;IF([.C22]=5;150;IF([.C22]=6;375;IF([.C22]=7;750;0))))))" office:value-type="float" office:value="0" calcext:value-type="float">
            <text:p>0</text:p>
          </table:table-cell>
          <table:table-cell table:number-columns-repeated="2"/>
          <table:table-cell table:formula="of:=[.P22]*28+[.Q22]*22+[.R22]*100+[.S22]*18+[.T22]*35+[.U22]*22+[.V22]*100+[.W22]*18+[.X22]*80+[.Y22]*1100+[.Z22]*200+[.AA22]*100+[.AB22]*32+[.AC22]*1700+[.AD22]*850+[.AE22]*200+[.AF22]*400+[.AG22]*70+[.AH22]*300+[.AI22]*450+[.AJ22]*1100+[.AK22]*500+[.AL22]*60+[.AM22]*600+[.AN22]*20+[.AO22]*60+[.AP22]*20+[.AQ22]*100+[.AR22]*900+[.AS22]*1300+[.AT22]*2500+[.AU22]*900+[.AV22]*1200+[.AW22]*1500+[.AX22]*110+[.AY22]*130+[.AZ22]*50+[.BA22]*600+[.BB22]*5500+[.BC22]*70000+[.BD22]*90000" office:value-type="float" office:value="0" calcext:value-type="float">
            <text:p>0</text:p>
          </table:table-cell>
          <table:table-cell table:style-name="ce2" table:formula="of:=[.G22]-[.F22]" office:value-type="float" office:value="0" calcext:value-type="float">
            <text:p>0</text:p>
          </table:table-cell>
          <table:table-cell table:style-name="ce3" table:formula="of:=IF([.F22]=0;&quot;&quot;;[.G22]/[.F22])">
            <text:p/>
          </table:table-cell>
          <table:table-cell table:formula="of:=IF([.G22]=0;&quot;&quot;;[.E22]*[.F22]/[.G22])">
            <text:p/>
          </table:table-cell>
          <table:table-cell table:style-name="ce5"/>
          <table:table-cell table:formula="of:=[.D22]*[.K22]" office:value-type="float" office:value="0" calcext:value-type="float">
            <text:p>0</text:p>
          </table:table-cell>
          <table:table-cell table:formula="of:=[.F22]*[.K22]" office:value-type="float" office:value="0" calcext:value-type="float">
            <text:p>0</text:p>
          </table:table-cell>
          <table:table-cell table:style-name="ce6" table:formula="of:=[.H22]*[.K22]" office:value-type="float" office:value="0" calcext:value-type="float">
            <text:p>0</text:p>
          </table:table-cell>
          <table:table-cell table:formula="of:=[.G22]*[.K22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3]=2;15;IF([.C23]=3;37;IF([.C23]=4;75;IF([.C23]=5;150;IF([.C23]=6;375;IF([.C23]=7;750;0))))))" office:value-type="float" office:value="0" calcext:value-type="float">
            <text:p>0</text:p>
          </table:table-cell>
          <table:table-cell table:number-columns-repeated="2"/>
          <table:table-cell table:formula="of:=[.P23]*28+[.Q23]*22+[.R23]*100+[.S23]*18+[.T23]*35+[.U23]*22+[.V23]*100+[.W23]*18+[.X23]*80+[.Y23]*1100+[.Z23]*200+[.AA23]*100+[.AB23]*32+[.AC23]*1700+[.AD23]*850+[.AE23]*200+[.AF23]*400+[.AG23]*70+[.AH23]*300+[.AI23]*450+[.AJ23]*1100+[.AK23]*500+[.AL23]*60+[.AM23]*600+[.AN23]*20+[.AO23]*60+[.AP23]*20+[.AQ23]*100+[.AR23]*900+[.AS23]*1300+[.AT23]*2500+[.AU23]*900+[.AV23]*1200+[.AW23]*1500+[.AX23]*110+[.AY23]*130+[.AZ23]*50+[.BA23]*600+[.BB23]*5500+[.BC23]*70000+[.BD23]*90000" office:value-type="float" office:value="0" calcext:value-type="float">
            <text:p>0</text:p>
          </table:table-cell>
          <table:table-cell table:style-name="ce2" table:formula="of:=[.G23]-[.F23]" office:value-type="float" office:value="0" calcext:value-type="float">
            <text:p>0</text:p>
          </table:table-cell>
          <table:table-cell table:style-name="ce3" table:formula="of:=IF([.F23]=0;&quot;&quot;;[.G23]/[.F23])">
            <text:p/>
          </table:table-cell>
          <table:table-cell table:formula="of:=IF([.G23]=0;&quot;&quot;;[.E23]*[.F23]/[.G23])">
            <text:p/>
          </table:table-cell>
          <table:table-cell table:style-name="ce5"/>
          <table:table-cell table:formula="of:=[.D23]*[.K23]" office:value-type="float" office:value="0" calcext:value-type="float">
            <text:p>0</text:p>
          </table:table-cell>
          <table:table-cell table:formula="of:=[.F23]*[.K23]" office:value-type="float" office:value="0" calcext:value-type="float">
            <text:p>0</text:p>
          </table:table-cell>
          <table:table-cell table:style-name="ce6" table:formula="of:=[.H23]*[.K23]" office:value-type="float" office:value="0" calcext:value-type="float">
            <text:p>0</text:p>
          </table:table-cell>
          <table:table-cell table:formula="of:=[.G23]*[.K23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4]=2;15;IF([.C24]=3;37;IF([.C24]=4;75;IF([.C24]=5;150;IF([.C24]=6;375;IF([.C24]=7;750;0))))))" office:value-type="float" office:value="0" calcext:value-type="float">
            <text:p>0</text:p>
          </table:table-cell>
          <table:table-cell table:number-columns-repeated="2"/>
          <table:table-cell table:formula="of:=[.P24]*28+[.Q24]*22+[.R24]*100+[.S24]*18+[.T24]*35+[.U24]*22+[.V24]*100+[.W24]*18+[.X24]*80+[.Y24]*1100+[.Z24]*200+[.AA24]*100+[.AB24]*32+[.AC24]*1700+[.AD24]*850+[.AE24]*200+[.AF24]*400+[.AG24]*70+[.AH24]*300+[.AI24]*450+[.AJ24]*1100+[.AK24]*500+[.AL24]*60+[.AM24]*600+[.AN24]*20+[.AO24]*60+[.AP24]*20+[.AQ24]*100+[.AR24]*900+[.AS24]*1300+[.AT24]*2500+[.AU24]*900+[.AV24]*1200+[.AW24]*1500+[.AX24]*110+[.AY24]*130+[.AZ24]*50+[.BA24]*600+[.BB24]*5500+[.BC24]*70000+[.BD24]*90000" office:value-type="float" office:value="0" calcext:value-type="float">
            <text:p>0</text:p>
          </table:table-cell>
          <table:table-cell table:style-name="ce2" table:formula="of:=[.G24]-[.F24]" office:value-type="float" office:value="0" calcext:value-type="float">
            <text:p>0</text:p>
          </table:table-cell>
          <table:table-cell table:style-name="ce3" table:formula="of:=IF([.F24]=0;&quot;&quot;;[.G24]/[.F24])">
            <text:p/>
          </table:table-cell>
          <table:table-cell table:formula="of:=IF([.G24]=0;&quot;&quot;;[.E24]*[.F24]/[.G24])">
            <text:p/>
          </table:table-cell>
          <table:table-cell table:style-name="ce5"/>
          <table:table-cell table:formula="of:=[.D24]*[.K24]" office:value-type="float" office:value="0" calcext:value-type="float">
            <text:p>0</text:p>
          </table:table-cell>
          <table:table-cell table:formula="of:=[.F24]*[.K24]" office:value-type="float" office:value="0" calcext:value-type="float">
            <text:p>0</text:p>
          </table:table-cell>
          <table:table-cell table:style-name="ce6" table:formula="of:=[.H24]*[.K24]" office:value-type="float" office:value="0" calcext:value-type="float">
            <text:p>0</text:p>
          </table:table-cell>
          <table:table-cell table:formula="of:=[.G24]*[.K24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5]=2;15;IF([.C25]=3;37;IF([.C25]=4;75;IF([.C25]=5;150;IF([.C25]=6;375;IF([.C25]=7;750;0))))))" office:value-type="float" office:value="0" calcext:value-type="float">
            <text:p>0</text:p>
          </table:table-cell>
          <table:table-cell table:number-columns-repeated="2"/>
          <table:table-cell table:formula="of:=[.P25]*28+[.Q25]*22+[.R25]*100+[.S25]*18+[.T25]*35+[.U25]*22+[.V25]*100+[.W25]*18+[.X25]*80+[.Y25]*1100+[.Z25]*200+[.AA25]*100+[.AB25]*32+[.AC25]*1700+[.AD25]*850+[.AE25]*200+[.AF25]*400+[.AG25]*70+[.AH25]*300+[.AI25]*450+[.AJ25]*1100+[.AK25]*500+[.AL25]*60+[.AM25]*600+[.AN25]*20+[.AO25]*60+[.AP25]*20+[.AQ25]*100+[.AR25]*900+[.AS25]*1300+[.AT25]*2500+[.AU25]*900+[.AV25]*1200+[.AW25]*1500+[.AX25]*110+[.AY25]*130+[.AZ25]*50+[.BA25]*600+[.BB25]*5500+[.BC25]*70000+[.BD25]*90000" office:value-type="float" office:value="0" calcext:value-type="float">
            <text:p>0</text:p>
          </table:table-cell>
          <table:table-cell table:style-name="ce2" table:formula="of:=[.G25]-[.F25]" office:value-type="float" office:value="0" calcext:value-type="float">
            <text:p>0</text:p>
          </table:table-cell>
          <table:table-cell table:style-name="ce3" table:formula="of:=IF([.F25]=0;&quot;&quot;;[.G25]/[.F25])">
            <text:p/>
          </table:table-cell>
          <table:table-cell table:formula="of:=IF([.G25]=0;&quot;&quot;;[.E25]*[.F25]/[.G25])">
            <text:p/>
          </table:table-cell>
          <table:table-cell table:style-name="ce5"/>
          <table:table-cell table:formula="of:=[.D25]*[.K25]" office:value-type="float" office:value="0" calcext:value-type="float">
            <text:p>0</text:p>
          </table:table-cell>
          <table:table-cell table:formula="of:=[.F25]*[.K25]" office:value-type="float" office:value="0" calcext:value-type="float">
            <text:p>0</text:p>
          </table:table-cell>
          <table:table-cell table:style-name="ce6" table:formula="of:=[.H25]*[.K25]" office:value-type="float" office:value="0" calcext:value-type="float">
            <text:p>0</text:p>
          </table:table-cell>
          <table:table-cell table:formula="of:=[.G25]*[.K25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6]=2;15;IF([.C26]=3;37;IF([.C26]=4;75;IF([.C26]=5;150;IF([.C26]=6;375;IF([.C26]=7;750;0))))))" office:value-type="float" office:value="0" calcext:value-type="float">
            <text:p>0</text:p>
          </table:table-cell>
          <table:table-cell table:number-columns-repeated="2"/>
          <table:table-cell table:formula="of:=[.P26]*28+[.Q26]*22+[.R26]*100+[.S26]*18+[.T26]*35+[.U26]*22+[.V26]*100+[.W26]*18+[.X26]*80+[.Y26]*1100+[.Z26]*200+[.AA26]*100+[.AB26]*32+[.AC26]*1700+[.AD26]*850+[.AE26]*200+[.AF26]*400+[.AG26]*70+[.AH26]*300+[.AI26]*450+[.AJ26]*1100+[.AK26]*500+[.AL26]*60+[.AM26]*600+[.AN26]*20+[.AO26]*60+[.AP26]*20+[.AQ26]*100+[.AR26]*900+[.AS26]*1300+[.AT26]*2500+[.AU26]*900+[.AV26]*1200+[.AW26]*1500+[.AX26]*110+[.AY26]*130+[.AZ26]*50+[.BA26]*600+[.BB26]*5500+[.BC26]*70000+[.BD26]*90000" office:value-type="float" office:value="0" calcext:value-type="float">
            <text:p>0</text:p>
          </table:table-cell>
          <table:table-cell table:style-name="ce2" table:formula="of:=[.G26]-[.F26]" office:value-type="float" office:value="0" calcext:value-type="float">
            <text:p>0</text:p>
          </table:table-cell>
          <table:table-cell table:style-name="ce3" table:formula="of:=IF([.F26]=0;&quot;&quot;;[.G26]/[.F26])">
            <text:p/>
          </table:table-cell>
          <table:table-cell table:formula="of:=IF([.G26]=0;&quot;&quot;;[.E26]*[.F26]/[.G26])">
            <text:p/>
          </table:table-cell>
          <table:table-cell table:style-name="ce5"/>
          <table:table-cell table:formula="of:=[.D26]*[.K26]" office:value-type="float" office:value="0" calcext:value-type="float">
            <text:p>0</text:p>
          </table:table-cell>
          <table:table-cell table:formula="of:=[.F26]*[.K26]" office:value-type="float" office:value="0" calcext:value-type="float">
            <text:p>0</text:p>
          </table:table-cell>
          <table:table-cell table:style-name="ce6" table:formula="of:=[.H26]*[.K26]" office:value-type="float" office:value="0" calcext:value-type="float">
            <text:p>0</text:p>
          </table:table-cell>
          <table:table-cell table:formula="of:=[.G26]*[.K26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7]=2;15;IF([.C27]=3;37;IF([.C27]=4;75;IF([.C27]=5;150;IF([.C27]=6;375;IF([.C27]=7;750;0))))))" office:value-type="float" office:value="0" calcext:value-type="float">
            <text:p>0</text:p>
          </table:table-cell>
          <table:table-cell table:number-columns-repeated="2"/>
          <table:table-cell table:formula="of:=[.P27]*28+[.Q27]*22+[.R27]*100+[.S27]*18+[.T27]*35+[.U27]*22+[.V27]*100+[.W27]*18+[.X27]*80+[.Y27]*1100+[.Z27]*200+[.AA27]*100+[.AB27]*32+[.AC27]*1700+[.AD27]*850+[.AE27]*200+[.AF27]*400+[.AG27]*70+[.AH27]*300+[.AI27]*450+[.AJ27]*1100+[.AK27]*500+[.AL27]*60+[.AM27]*600+[.AN27]*20+[.AO27]*60+[.AP27]*20+[.AQ27]*100+[.AR27]*900+[.AS27]*1300+[.AT27]*2500+[.AU27]*900+[.AV27]*1200+[.AW27]*1500+[.AX27]*110+[.AY27]*130+[.AZ27]*50+[.BA27]*600+[.BB27]*5500+[.BC27]*70000+[.BD27]*90000" office:value-type="float" office:value="0" calcext:value-type="float">
            <text:p>0</text:p>
          </table:table-cell>
          <table:table-cell table:style-name="ce2" table:formula="of:=[.G27]-[.F27]" office:value-type="float" office:value="0" calcext:value-type="float">
            <text:p>0</text:p>
          </table:table-cell>
          <table:table-cell table:style-name="ce3" table:formula="of:=IF([.F27]=0;&quot;&quot;;[.G27]/[.F27])">
            <text:p/>
          </table:table-cell>
          <table:table-cell table:formula="of:=IF([.G27]=0;&quot;&quot;;[.E27]*[.F27]/[.G27])">
            <text:p/>
          </table:table-cell>
          <table:table-cell table:style-name="ce5"/>
          <table:table-cell table:formula="of:=[.D27]*[.K27]" office:value-type="float" office:value="0" calcext:value-type="float">
            <text:p>0</text:p>
          </table:table-cell>
          <table:table-cell table:formula="of:=[.F27]*[.K27]" office:value-type="float" office:value="0" calcext:value-type="float">
            <text:p>0</text:p>
          </table:table-cell>
          <table:table-cell table:style-name="ce6" table:formula="of:=[.H27]*[.K27]" office:value-type="float" office:value="0" calcext:value-type="float">
            <text:p>0</text:p>
          </table:table-cell>
          <table:table-cell table:formula="of:=[.G27]*[.K27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8]=2;15;IF([.C28]=3;37;IF([.C28]=4;75;IF([.C28]=5;150;IF([.C28]=6;375;IF([.C28]=7;750;0))))))" office:value-type="float" office:value="0" calcext:value-type="float">
            <text:p>0</text:p>
          </table:table-cell>
          <table:table-cell table:number-columns-repeated="2"/>
          <table:table-cell table:formula="of:=[.P28]*28+[.Q28]*22+[.R28]*100+[.S28]*18+[.T28]*35+[.U28]*22+[.V28]*100+[.W28]*18+[.X28]*80+[.Y28]*1100+[.Z28]*200+[.AA28]*100+[.AB28]*32+[.AC28]*1700+[.AD28]*850+[.AE28]*200+[.AF28]*400+[.AG28]*70+[.AH28]*300+[.AI28]*450+[.AJ28]*1100+[.AK28]*500+[.AL28]*60+[.AM28]*600+[.AN28]*20+[.AO28]*60+[.AP28]*20+[.AQ28]*100+[.AR28]*900+[.AS28]*1300+[.AT28]*2500+[.AU28]*900+[.AV28]*1200+[.AW28]*1500+[.AX28]*110+[.AY28]*130+[.AZ28]*50+[.BA28]*600+[.BB28]*5500+[.BC28]*70000+[.BD28]*90000" office:value-type="float" office:value="0" calcext:value-type="float">
            <text:p>0</text:p>
          </table:table-cell>
          <table:table-cell table:style-name="ce2" table:formula="of:=[.G28]-[.F28]" office:value-type="float" office:value="0" calcext:value-type="float">
            <text:p>0</text:p>
          </table:table-cell>
          <table:table-cell table:style-name="ce3" table:formula="of:=IF([.F28]=0;&quot;&quot;;[.G28]/[.F28])">
            <text:p/>
          </table:table-cell>
          <table:table-cell table:formula="of:=IF([.G28]=0;&quot;&quot;;[.E28]*[.F28]/[.G28])">
            <text:p/>
          </table:table-cell>
          <table:table-cell table:style-name="ce5"/>
          <table:table-cell table:formula="of:=[.D28]*[.K28]" office:value-type="float" office:value="0" calcext:value-type="float">
            <text:p>0</text:p>
          </table:table-cell>
          <table:table-cell table:formula="of:=[.F28]*[.K28]" office:value-type="float" office:value="0" calcext:value-type="float">
            <text:p>0</text:p>
          </table:table-cell>
          <table:table-cell table:style-name="ce6" table:formula="of:=[.H28]*[.K28]" office:value-type="float" office:value="0" calcext:value-type="float">
            <text:p>0</text:p>
          </table:table-cell>
          <table:table-cell table:formula="of:=[.G28]*[.K28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29]=2;15;IF([.C29]=3;37;IF([.C29]=4;75;IF([.C29]=5;150;IF([.C29]=6;375;IF([.C29]=7;750;0))))))" office:value-type="float" office:value="0" calcext:value-type="float">
            <text:p>0</text:p>
          </table:table-cell>
          <table:table-cell table:number-columns-repeated="2"/>
          <table:table-cell table:formula="of:=[.P29]*28+[.Q29]*22+[.R29]*100+[.S29]*18+[.T29]*35+[.U29]*22+[.V29]*100+[.W29]*18+[.X29]*80+[.Y29]*1100+[.Z29]*200+[.AA29]*100+[.AB29]*32+[.AC29]*1700+[.AD29]*850+[.AE29]*200+[.AF29]*400+[.AG29]*70+[.AH29]*300+[.AI29]*450+[.AJ29]*1100+[.AK29]*500+[.AL29]*60+[.AM29]*600+[.AN29]*20+[.AO29]*60+[.AP29]*20+[.AQ29]*100+[.AR29]*900+[.AS29]*1300+[.AT29]*2500+[.AU29]*900+[.AV29]*1200+[.AW29]*1500+[.AX29]*110+[.AY29]*130+[.AZ29]*50+[.BA29]*600+[.BB29]*5500+[.BC29]*70000+[.BD29]*90000" office:value-type="float" office:value="0" calcext:value-type="float">
            <text:p>0</text:p>
          </table:table-cell>
          <table:table-cell table:style-name="ce2" table:formula="of:=[.G29]-[.F29]" office:value-type="float" office:value="0" calcext:value-type="float">
            <text:p>0</text:p>
          </table:table-cell>
          <table:table-cell table:style-name="ce3" table:formula="of:=IF([.F29]=0;&quot;&quot;;[.G29]/[.F29])">
            <text:p/>
          </table:table-cell>
          <table:table-cell table:formula="of:=IF([.G29]=0;&quot;&quot;;[.E29]*[.F29]/[.G29])">
            <text:p/>
          </table:table-cell>
          <table:table-cell table:style-name="ce5"/>
          <table:table-cell table:formula="of:=[.D29]*[.K29]" office:value-type="float" office:value="0" calcext:value-type="float">
            <text:p>0</text:p>
          </table:table-cell>
          <table:table-cell table:formula="of:=[.F29]*[.K29]" office:value-type="float" office:value="0" calcext:value-type="float">
            <text:p>0</text:p>
          </table:table-cell>
          <table:table-cell table:style-name="ce6" table:formula="of:=[.H29]*[.K29]" office:value-type="float" office:value="0" calcext:value-type="float">
            <text:p>0</text:p>
          </table:table-cell>
          <table:table-cell table:formula="of:=[.G29]*[.K29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0]=2;15;IF([.C30]=3;37;IF([.C30]=4;75;IF([.C30]=5;150;IF([.C30]=6;375;IF([.C30]=7;750;0))))))" office:value-type="float" office:value="0" calcext:value-type="float">
            <text:p>0</text:p>
          </table:table-cell>
          <table:table-cell table:number-columns-repeated="2"/>
          <table:table-cell table:formula="of:=[.P30]*28+[.Q30]*22+[.R30]*100+[.S30]*18+[.T30]*35+[.U30]*22+[.V30]*100+[.W30]*18+[.X30]*80+[.Y30]*1100+[.Z30]*200+[.AA30]*100+[.AB30]*32+[.AC30]*1700+[.AD30]*850+[.AE30]*200+[.AF30]*400+[.AG30]*70+[.AH30]*300+[.AI30]*450+[.AJ30]*1100+[.AK30]*500+[.AL30]*60+[.AM30]*600+[.AN30]*20+[.AO30]*60+[.AP30]*20+[.AQ30]*100+[.AR30]*900+[.AS30]*1300+[.AT30]*2500+[.AU30]*900+[.AV30]*1200+[.AW30]*1500+[.AX30]*110+[.AY30]*130+[.AZ30]*50+[.BA30]*600+[.BB30]*5500+[.BC30]*70000+[.BD30]*90000" office:value-type="float" office:value="0" calcext:value-type="float">
            <text:p>0</text:p>
          </table:table-cell>
          <table:table-cell table:style-name="ce2" table:formula="of:=[.G30]-[.F30]" office:value-type="float" office:value="0" calcext:value-type="float">
            <text:p>0</text:p>
          </table:table-cell>
          <table:table-cell table:style-name="ce3" table:formula="of:=IF([.F30]=0;&quot;&quot;;[.G30]/[.F30])">
            <text:p/>
          </table:table-cell>
          <table:table-cell table:formula="of:=IF([.G30]=0;&quot;&quot;;[.E30]*[.F30]/[.G30])">
            <text:p/>
          </table:table-cell>
          <table:table-cell table:style-name="ce5"/>
          <table:table-cell table:formula="of:=[.D30]*[.K30]" office:value-type="float" office:value="0" calcext:value-type="float">
            <text:p>0</text:p>
          </table:table-cell>
          <table:table-cell table:formula="of:=[.F30]*[.K30]" office:value-type="float" office:value="0" calcext:value-type="float">
            <text:p>0</text:p>
          </table:table-cell>
          <table:table-cell table:style-name="ce6" table:formula="of:=[.H30]*[.K30]" office:value-type="float" office:value="0" calcext:value-type="float">
            <text:p>0</text:p>
          </table:table-cell>
          <table:table-cell table:formula="of:=[.G30]*[.K30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1]=2;15;IF([.C31]=3;37;IF([.C31]=4;75;IF([.C31]=5;150;IF([.C31]=6;375;IF([.C31]=7;750;0))))))" office:value-type="float" office:value="0" calcext:value-type="float">
            <text:p>0</text:p>
          </table:table-cell>
          <table:table-cell table:number-columns-repeated="2"/>
          <table:table-cell table:formula="of:=[.P31]*28+[.Q31]*22+[.R31]*100+[.S31]*18+[.T31]*35+[.U31]*22+[.V31]*100+[.W31]*18+[.X31]*80+[.Y31]*1100+[.Z31]*200+[.AA31]*100+[.AB31]*32+[.AC31]*1700+[.AD31]*850+[.AE31]*200+[.AF31]*400+[.AG31]*70+[.AH31]*300+[.AI31]*450+[.AJ31]*1100+[.AK31]*500+[.AL31]*60+[.AM31]*600+[.AN31]*20+[.AO31]*60+[.AP31]*20+[.AQ31]*100+[.AR31]*900+[.AS31]*1300+[.AT31]*2500+[.AU31]*900+[.AV31]*1200+[.AW31]*1500+[.AX31]*110+[.AY31]*130+[.AZ31]*50+[.BA31]*600+[.BB31]*5500+[.BC31]*70000+[.BD31]*90000" office:value-type="float" office:value="0" calcext:value-type="float">
            <text:p>0</text:p>
          </table:table-cell>
          <table:table-cell table:style-name="ce2" table:formula="of:=[.G31]-[.F31]" office:value-type="float" office:value="0" calcext:value-type="float">
            <text:p>0</text:p>
          </table:table-cell>
          <table:table-cell table:style-name="ce3" table:formula="of:=IF([.F31]=0;&quot;&quot;;[.G31]/[.F31])">
            <text:p/>
          </table:table-cell>
          <table:table-cell table:formula="of:=IF([.G31]=0;&quot;&quot;;[.E31]*[.F31]/[.G31])">
            <text:p/>
          </table:table-cell>
          <table:table-cell table:style-name="ce5"/>
          <table:table-cell table:formula="of:=[.D31]*[.K31]" office:value-type="float" office:value="0" calcext:value-type="float">
            <text:p>0</text:p>
          </table:table-cell>
          <table:table-cell table:formula="of:=[.F31]*[.K31]" office:value-type="float" office:value="0" calcext:value-type="float">
            <text:p>0</text:p>
          </table:table-cell>
          <table:table-cell table:style-name="ce6" table:formula="of:=[.H31]*[.K31]" office:value-type="float" office:value="0" calcext:value-type="float">
            <text:p>0</text:p>
          </table:table-cell>
          <table:table-cell table:formula="of:=[.G31]*[.K31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2]=2;15;IF([.C32]=3;37;IF([.C32]=4;75;IF([.C32]=5;150;IF([.C32]=6;375;IF([.C32]=7;750;0))))))" office:value-type="float" office:value="0" calcext:value-type="float">
            <text:p>0</text:p>
          </table:table-cell>
          <table:table-cell table:number-columns-repeated="2"/>
          <table:table-cell table:formula="of:=[.P32]*28+[.Q32]*22+[.R32]*100+[.S32]*18+[.T32]*35+[.U32]*22+[.V32]*100+[.W32]*18+[.X32]*80+[.Y32]*1100+[.Z32]*200+[.AA32]*100+[.AB32]*32+[.AC32]*1700+[.AD32]*850+[.AE32]*200+[.AF32]*400+[.AG32]*70+[.AH32]*300+[.AI32]*450+[.AJ32]*1100+[.AK32]*500+[.AL32]*60+[.AM32]*600+[.AN32]*20+[.AO32]*60+[.AP32]*20+[.AQ32]*100+[.AR32]*900+[.AS32]*1300+[.AT32]*2500+[.AU32]*900+[.AV32]*1200+[.AW32]*1500+[.AX32]*110+[.AY32]*130+[.AZ32]*50+[.BA32]*600+[.BB32]*5500+[.BC32]*70000+[.BD32]*90000" office:value-type="float" office:value="0" calcext:value-type="float">
            <text:p>0</text:p>
          </table:table-cell>
          <table:table-cell table:style-name="ce2" table:formula="of:=[.G32]-[.F32]" office:value-type="float" office:value="0" calcext:value-type="float">
            <text:p>0</text:p>
          </table:table-cell>
          <table:table-cell table:style-name="ce3" table:formula="of:=IF([.F32]=0;&quot;&quot;;[.G32]/[.F32])">
            <text:p/>
          </table:table-cell>
          <table:table-cell table:formula="of:=IF([.G32]=0;&quot;&quot;;[.E32]*[.F32]/[.G32])">
            <text:p/>
          </table:table-cell>
          <table:table-cell table:style-name="ce5"/>
          <table:table-cell table:formula="of:=[.D32]*[.K32]" office:value-type="float" office:value="0" calcext:value-type="float">
            <text:p>0</text:p>
          </table:table-cell>
          <table:table-cell table:formula="of:=[.F32]*[.K32]" office:value-type="float" office:value="0" calcext:value-type="float">
            <text:p>0</text:p>
          </table:table-cell>
          <table:table-cell table:style-name="ce6" table:formula="of:=[.H32]*[.K32]" office:value-type="float" office:value="0" calcext:value-type="float">
            <text:p>0</text:p>
          </table:table-cell>
          <table:table-cell table:formula="of:=[.G32]*[.K32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3]=2;15;IF([.C33]=3;37;IF([.C33]=4;75;IF([.C33]=5;150;IF([.C33]=6;375;IF([.C33]=7;750;0))))))" office:value-type="float" office:value="0" calcext:value-type="float">
            <text:p>0</text:p>
          </table:table-cell>
          <table:table-cell table:number-columns-repeated="2"/>
          <table:table-cell table:formula="of:=[.P33]*28+[.Q33]*22+[.R33]*100+[.S33]*18+[.T33]*35+[.U33]*22+[.V33]*100+[.W33]*18+[.X33]*80+[.Y33]*1100+[.Z33]*200+[.AA33]*100+[.AB33]*32+[.AC33]*1700+[.AD33]*850+[.AE33]*200+[.AF33]*400+[.AG33]*70+[.AH33]*300+[.AI33]*450+[.AJ33]*1100+[.AK33]*500+[.AL33]*60+[.AM33]*600+[.AN33]*20+[.AO33]*60+[.AP33]*20+[.AQ33]*100+[.AR33]*900+[.AS33]*1300+[.AT33]*2500+[.AU33]*900+[.AV33]*1200+[.AW33]*1500+[.AX33]*110+[.AY33]*130+[.AZ33]*50+[.BA33]*600+[.BB33]*5500+[.BC33]*70000+[.BD33]*90000" office:value-type="float" office:value="0" calcext:value-type="float">
            <text:p>0</text:p>
          </table:table-cell>
          <table:table-cell table:style-name="ce2" table:formula="of:=[.G33]-[.F33]" office:value-type="float" office:value="0" calcext:value-type="float">
            <text:p>0</text:p>
          </table:table-cell>
          <table:table-cell table:style-name="ce3" table:formula="of:=IF([.F33]=0;&quot;&quot;;[.G33]/[.F33])">
            <text:p/>
          </table:table-cell>
          <table:table-cell table:formula="of:=IF([.G33]=0;&quot;&quot;;[.E33]*[.F33]/[.G33])">
            <text:p/>
          </table:table-cell>
          <table:table-cell table:style-name="ce5"/>
          <table:table-cell table:formula="of:=[.D33]*[.K33]" office:value-type="float" office:value="0" calcext:value-type="float">
            <text:p>0</text:p>
          </table:table-cell>
          <table:table-cell table:formula="of:=[.F33]*[.K33]" office:value-type="float" office:value="0" calcext:value-type="float">
            <text:p>0</text:p>
          </table:table-cell>
          <table:table-cell table:style-name="ce6" table:formula="of:=[.H33]*[.K33]" office:value-type="float" office:value="0" calcext:value-type="float">
            <text:p>0</text:p>
          </table:table-cell>
          <table:table-cell table:formula="of:=[.G33]*[.K33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4]=2;15;IF([.C34]=3;37;IF([.C34]=4;75;IF([.C34]=5;150;IF([.C34]=6;375;IF([.C34]=7;750;0))))))" office:value-type="float" office:value="0" calcext:value-type="float">
            <text:p>0</text:p>
          </table:table-cell>
          <table:table-cell table:number-columns-repeated="2"/>
          <table:table-cell table:formula="of:=[.P34]*28+[.Q34]*22+[.R34]*100+[.S34]*18+[.T34]*35+[.U34]*22+[.V34]*100+[.W34]*18+[.X34]*80+[.Y34]*1100+[.Z34]*200+[.AA34]*100+[.AB34]*32+[.AC34]*1700+[.AD34]*850+[.AE34]*200+[.AF34]*400+[.AG34]*70+[.AH34]*300+[.AI34]*450+[.AJ34]*1100+[.AK34]*500+[.AL34]*60+[.AM34]*600+[.AN34]*20+[.AO34]*60+[.AP34]*20+[.AQ34]*100+[.AR34]*900+[.AS34]*1300+[.AT34]*2500+[.AU34]*900+[.AV34]*1200+[.AW34]*1500+[.AX34]*110+[.AY34]*130+[.AZ34]*50+[.BA34]*600+[.BB34]*5500+[.BC34]*70000+[.BD34]*90000" office:value-type="float" office:value="0" calcext:value-type="float">
            <text:p>0</text:p>
          </table:table-cell>
          <table:table-cell table:style-name="ce2" table:formula="of:=[.G34]-[.F34]" office:value-type="float" office:value="0" calcext:value-type="float">
            <text:p>0</text:p>
          </table:table-cell>
          <table:table-cell table:style-name="ce3" table:formula="of:=IF([.F34]=0;&quot;&quot;;[.G34]/[.F34])">
            <text:p/>
          </table:table-cell>
          <table:table-cell table:formula="of:=IF([.G34]=0;&quot;&quot;;[.E34]*[.F34]/[.G34])">
            <text:p/>
          </table:table-cell>
          <table:table-cell table:style-name="ce5"/>
          <table:table-cell table:formula="of:=[.D34]*[.K34]" office:value-type="float" office:value="0" calcext:value-type="float">
            <text:p>0</text:p>
          </table:table-cell>
          <table:table-cell table:formula="of:=[.F34]*[.K34]" office:value-type="float" office:value="0" calcext:value-type="float">
            <text:p>0</text:p>
          </table:table-cell>
          <table:table-cell table:style-name="ce6" table:formula="of:=[.H34]*[.K34]" office:value-type="float" office:value="0" calcext:value-type="float">
            <text:p>0</text:p>
          </table:table-cell>
          <table:table-cell table:formula="of:=[.G34]*[.K34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5]=2;15;IF([.C35]=3;37;IF([.C35]=4;75;IF([.C35]=5;150;IF([.C35]=6;375;IF([.C35]=7;750;0))))))" office:value-type="float" office:value="0" calcext:value-type="float">
            <text:p>0</text:p>
          </table:table-cell>
          <table:table-cell table:number-columns-repeated="2"/>
          <table:table-cell table:formula="of:=[.P35]*28+[.Q35]*22+[.R35]*100+[.S35]*18+[.T35]*35+[.U35]*22+[.V35]*100+[.W35]*18+[.X35]*80+[.Y35]*1100+[.Z35]*200+[.AA35]*100+[.AB35]*32+[.AC35]*1700+[.AD35]*850+[.AE35]*200+[.AF35]*400+[.AG35]*70+[.AH35]*300+[.AI35]*450+[.AJ35]*1100+[.AK35]*500+[.AL35]*60+[.AM35]*600+[.AN35]*20+[.AO35]*60+[.AP35]*20+[.AQ35]*100+[.AR35]*900+[.AS35]*1300+[.AT35]*2500+[.AU35]*900+[.AV35]*1200+[.AW35]*1500+[.AX35]*110+[.AY35]*130+[.AZ35]*50+[.BA35]*600+[.BB35]*5500+[.BC35]*70000+[.BD35]*90000" office:value-type="float" office:value="0" calcext:value-type="float">
            <text:p>0</text:p>
          </table:table-cell>
          <table:table-cell table:style-name="ce2" table:formula="of:=[.G35]-[.F35]" office:value-type="float" office:value="0" calcext:value-type="float">
            <text:p>0</text:p>
          </table:table-cell>
          <table:table-cell table:style-name="ce3" table:formula="of:=IF([.F35]=0;&quot;&quot;;[.G35]/[.F35])">
            <text:p/>
          </table:table-cell>
          <table:table-cell table:formula="of:=IF([.G35]=0;&quot;&quot;;[.E35]*[.F35]/[.G35])">
            <text:p/>
          </table:table-cell>
          <table:table-cell table:style-name="ce5"/>
          <table:table-cell table:formula="of:=[.D35]*[.K35]" office:value-type="float" office:value="0" calcext:value-type="float">
            <text:p>0</text:p>
          </table:table-cell>
          <table:table-cell table:formula="of:=[.F35]*[.K35]" office:value-type="float" office:value="0" calcext:value-type="float">
            <text:p>0</text:p>
          </table:table-cell>
          <table:table-cell table:style-name="ce6" table:formula="of:=[.H35]*[.K35]" office:value-type="float" office:value="0" calcext:value-type="float">
            <text:p>0</text:p>
          </table:table-cell>
          <table:table-cell table:formula="of:=[.G35]*[.K35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6]=2;15;IF([.C36]=3;37;IF([.C36]=4;75;IF([.C36]=5;150;IF([.C36]=6;375;IF([.C36]=7;750;0))))))" office:value-type="float" office:value="0" calcext:value-type="float">
            <text:p>0</text:p>
          </table:table-cell>
          <table:table-cell table:number-columns-repeated="2"/>
          <table:table-cell table:formula="of:=[.P36]*28+[.Q36]*22+[.R36]*100+[.S36]*18+[.T36]*35+[.U36]*22+[.V36]*100+[.W36]*18+[.X36]*80+[.Y36]*1100+[.Z36]*200+[.AA36]*100+[.AB36]*32+[.AC36]*1700+[.AD36]*850+[.AE36]*200+[.AF36]*400+[.AG36]*70+[.AH36]*300+[.AI36]*450+[.AJ36]*1100+[.AK36]*500+[.AL36]*60+[.AM36]*600+[.AN36]*20+[.AO36]*60+[.AP36]*20+[.AQ36]*100+[.AR36]*900+[.AS36]*1300+[.AT36]*2500+[.AU36]*900+[.AV36]*1200+[.AW36]*1500+[.AX36]*110+[.AY36]*130+[.AZ36]*50+[.BA36]*600+[.BB36]*5500+[.BC36]*70000+[.BD36]*90000" office:value-type="float" office:value="0" calcext:value-type="float">
            <text:p>0</text:p>
          </table:table-cell>
          <table:table-cell table:style-name="ce2" table:formula="of:=[.G36]-[.F36]" office:value-type="float" office:value="0" calcext:value-type="float">
            <text:p>0</text:p>
          </table:table-cell>
          <table:table-cell table:style-name="ce3" table:formula="of:=IF([.F36]=0;&quot;&quot;;[.G36]/[.F36])">
            <text:p/>
          </table:table-cell>
          <table:table-cell table:formula="of:=IF([.G36]=0;&quot;&quot;;[.E36]*[.F36]/[.G36])">
            <text:p/>
          </table:table-cell>
          <table:table-cell table:style-name="ce5"/>
          <table:table-cell table:formula="of:=[.D36]*[.K36]" office:value-type="float" office:value="0" calcext:value-type="float">
            <text:p>0</text:p>
          </table:table-cell>
          <table:table-cell table:formula="of:=[.F36]*[.K36]" office:value-type="float" office:value="0" calcext:value-type="float">
            <text:p>0</text:p>
          </table:table-cell>
          <table:table-cell table:style-name="ce6" table:formula="of:=[.H36]*[.K36]" office:value-type="float" office:value="0" calcext:value-type="float">
            <text:p>0</text:p>
          </table:table-cell>
          <table:table-cell table:formula="of:=[.G36]*[.K36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7]=2;15;IF([.C37]=3;37;IF([.C37]=4;75;IF([.C37]=5;150;IF([.C37]=6;375;IF([.C37]=7;750;0))))))" office:value-type="float" office:value="0" calcext:value-type="float">
            <text:p>0</text:p>
          </table:table-cell>
          <table:table-cell table:number-columns-repeated="2"/>
          <table:table-cell table:formula="of:=[.P37]*28+[.Q37]*22+[.R37]*100+[.S37]*18+[.T37]*35+[.U37]*22+[.V37]*100+[.W37]*18+[.X37]*80+[.Y37]*1100+[.Z37]*200+[.AA37]*100+[.AB37]*32+[.AC37]*1700+[.AD37]*850+[.AE37]*200+[.AF37]*400+[.AG37]*70+[.AH37]*300+[.AI37]*450+[.AJ37]*1100+[.AK37]*500+[.AL37]*60+[.AM37]*600+[.AN37]*20+[.AO37]*60+[.AP37]*20+[.AQ37]*100+[.AR37]*900+[.AS37]*1300+[.AT37]*2500+[.AU37]*900+[.AV37]*1200+[.AW37]*1500+[.AX37]*110+[.AY37]*130+[.AZ37]*50+[.BA37]*600+[.BB37]*5500+[.BC37]*70000+[.BD37]*90000" office:value-type="float" office:value="0" calcext:value-type="float">
            <text:p>0</text:p>
          </table:table-cell>
          <table:table-cell table:style-name="ce2" table:formula="of:=[.G37]-[.F37]" office:value-type="float" office:value="0" calcext:value-type="float">
            <text:p>0</text:p>
          </table:table-cell>
          <table:table-cell table:style-name="ce3" table:formula="of:=IF([.F37]=0;&quot;&quot;;[.G37]/[.F37])">
            <text:p/>
          </table:table-cell>
          <table:table-cell table:formula="of:=IF([.G37]=0;&quot;&quot;;[.E37]*[.F37]/[.G37])">
            <text:p/>
          </table:table-cell>
          <table:table-cell table:style-name="ce5"/>
          <table:table-cell table:formula="of:=[.D37]*[.K37]" office:value-type="float" office:value="0" calcext:value-type="float">
            <text:p>0</text:p>
          </table:table-cell>
          <table:table-cell table:formula="of:=[.F37]*[.K37]" office:value-type="float" office:value="0" calcext:value-type="float">
            <text:p>0</text:p>
          </table:table-cell>
          <table:table-cell table:style-name="ce6" table:formula="of:=[.H37]*[.K37]" office:value-type="float" office:value="0" calcext:value-type="float">
            <text:p>0</text:p>
          </table:table-cell>
          <table:table-cell table:formula="of:=[.G37]*[.K37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8]=2;15;IF([.C38]=3;37;IF([.C38]=4;75;IF([.C38]=5;150;IF([.C38]=6;375;IF([.C38]=7;750;0))))))" office:value-type="float" office:value="0" calcext:value-type="float">
            <text:p>0</text:p>
          </table:table-cell>
          <table:table-cell table:number-columns-repeated="2"/>
          <table:table-cell table:formula="of:=[.P38]*28+[.Q38]*22+[.R38]*100+[.S38]*18+[.T38]*35+[.U38]*22+[.V38]*100+[.W38]*18+[.X38]*80+[.Y38]*1100+[.Z38]*200+[.AA38]*100+[.AB38]*32+[.AC38]*1700+[.AD38]*850+[.AE38]*200+[.AF38]*400+[.AG38]*70+[.AH38]*300+[.AI38]*450+[.AJ38]*1100+[.AK38]*500+[.AL38]*60+[.AM38]*600+[.AN38]*20+[.AO38]*60+[.AP38]*20+[.AQ38]*100+[.AR38]*900+[.AS38]*1300+[.AT38]*2500+[.AU38]*900+[.AV38]*1200+[.AW38]*1500+[.AX38]*110+[.AY38]*130+[.AZ38]*50+[.BA38]*600+[.BB38]*5500+[.BC38]*70000+[.BD38]*90000" office:value-type="float" office:value="0" calcext:value-type="float">
            <text:p>0</text:p>
          </table:table-cell>
          <table:table-cell table:style-name="ce2" table:formula="of:=[.G38]-[.F38]" office:value-type="float" office:value="0" calcext:value-type="float">
            <text:p>0</text:p>
          </table:table-cell>
          <table:table-cell table:style-name="ce3" table:formula="of:=IF([.F38]=0;&quot;&quot;;[.G38]/[.F38])">
            <text:p/>
          </table:table-cell>
          <table:table-cell table:formula="of:=IF([.G38]=0;&quot;&quot;;[.E38]*[.F38]/[.G38])">
            <text:p/>
          </table:table-cell>
          <table:table-cell table:style-name="ce5"/>
          <table:table-cell table:formula="of:=[.D38]*[.K38]" office:value-type="float" office:value="0" calcext:value-type="float">
            <text:p>0</text:p>
          </table:table-cell>
          <table:table-cell table:formula="of:=[.F38]*[.K38]" office:value-type="float" office:value="0" calcext:value-type="float">
            <text:p>0</text:p>
          </table:table-cell>
          <table:table-cell table:style-name="ce6" table:formula="of:=[.H38]*[.K38]" office:value-type="float" office:value="0" calcext:value-type="float">
            <text:p>0</text:p>
          </table:table-cell>
          <table:table-cell table:formula="of:=[.G38]*[.K38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39]=2;15;IF([.C39]=3;37;IF([.C39]=4;75;IF([.C39]=5;150;IF([.C39]=6;375;IF([.C39]=7;750;0))))))" office:value-type="float" office:value="0" calcext:value-type="float">
            <text:p>0</text:p>
          </table:table-cell>
          <table:table-cell table:number-columns-repeated="2"/>
          <table:table-cell table:formula="of:=[.P39]*28+[.Q39]*22+[.R39]*100+[.S39]*18+[.T39]*35+[.U39]*22+[.V39]*100+[.W39]*18+[.X39]*80+[.Y39]*1100+[.Z39]*200+[.AA39]*100+[.AB39]*32+[.AC39]*1700+[.AD39]*850+[.AE39]*200+[.AF39]*400+[.AG39]*70+[.AH39]*300+[.AI39]*450+[.AJ39]*1100+[.AK39]*500+[.AL39]*60+[.AM39]*600+[.AN39]*20+[.AO39]*60+[.AP39]*20+[.AQ39]*100+[.AR39]*900+[.AS39]*1300+[.AT39]*2500+[.AU39]*900+[.AV39]*1200+[.AW39]*1500+[.AX39]*110+[.AY39]*130+[.AZ39]*50+[.BA39]*600+[.BB39]*5500+[.BC39]*70000+[.BD39]*90000" office:value-type="float" office:value="0" calcext:value-type="float">
            <text:p>0</text:p>
          </table:table-cell>
          <table:table-cell table:style-name="ce2" table:formula="of:=[.G39]-[.F39]" office:value-type="float" office:value="0" calcext:value-type="float">
            <text:p>0</text:p>
          </table:table-cell>
          <table:table-cell table:style-name="ce3" table:formula="of:=IF([.F39]=0;&quot;&quot;;[.G39]/[.F39])">
            <text:p/>
          </table:table-cell>
          <table:table-cell table:formula="of:=IF([.G39]=0;&quot;&quot;;[.E39]*[.F39]/[.G39])">
            <text:p/>
          </table:table-cell>
          <table:table-cell table:style-name="ce5"/>
          <table:table-cell table:formula="of:=[.D39]*[.K39]" office:value-type="float" office:value="0" calcext:value-type="float">
            <text:p>0</text:p>
          </table:table-cell>
          <table:table-cell table:formula="of:=[.F39]*[.K39]" office:value-type="float" office:value="0" calcext:value-type="float">
            <text:p>0</text:p>
          </table:table-cell>
          <table:table-cell table:style-name="ce6" table:formula="of:=[.H39]*[.K39]" office:value-type="float" office:value="0" calcext:value-type="float">
            <text:p>0</text:p>
          </table:table-cell>
          <table:table-cell table:formula="of:=[.G39]*[.K39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0]=2;15;IF([.C40]=3;37;IF([.C40]=4;75;IF([.C40]=5;150;IF([.C40]=6;375;IF([.C40]=7;750;0))))))" office:value-type="float" office:value="0" calcext:value-type="float">
            <text:p>0</text:p>
          </table:table-cell>
          <table:table-cell table:number-columns-repeated="2"/>
          <table:table-cell table:formula="of:=[.P40]*28+[.Q40]*22+[.R40]*100+[.S40]*18+[.T40]*35+[.U40]*22+[.V40]*100+[.W40]*18+[.X40]*80+[.Y40]*1100+[.Z40]*200+[.AA40]*100+[.AB40]*32+[.AC40]*1700+[.AD40]*850+[.AE40]*200+[.AF40]*400+[.AG40]*70+[.AH40]*300+[.AI40]*450+[.AJ40]*1100+[.AK40]*500+[.AL40]*60+[.AM40]*600+[.AN40]*20+[.AO40]*60+[.AP40]*20+[.AQ40]*100+[.AR40]*900+[.AS40]*1300+[.AT40]*2500+[.AU40]*900+[.AV40]*1200+[.AW40]*1500+[.AX40]*110+[.AY40]*130+[.AZ40]*50+[.BA40]*600+[.BB40]*5500+[.BC40]*70000+[.BD40]*90000" office:value-type="float" office:value="0" calcext:value-type="float">
            <text:p>0</text:p>
          </table:table-cell>
          <table:table-cell table:style-name="ce2" table:formula="of:=[.G40]-[.F40]" office:value-type="float" office:value="0" calcext:value-type="float">
            <text:p>0</text:p>
          </table:table-cell>
          <table:table-cell table:style-name="ce3" table:formula="of:=IF([.F40]=0;&quot;&quot;;[.G40]/[.F40])">
            <text:p/>
          </table:table-cell>
          <table:table-cell table:formula="of:=IF([.G40]=0;&quot;&quot;;[.E40]*[.F40]/[.G40])">
            <text:p/>
          </table:table-cell>
          <table:table-cell table:style-name="ce5"/>
          <table:table-cell table:formula="of:=[.D40]*[.K40]" office:value-type="float" office:value="0" calcext:value-type="float">
            <text:p>0</text:p>
          </table:table-cell>
          <table:table-cell table:formula="of:=[.F40]*[.K40]" office:value-type="float" office:value="0" calcext:value-type="float">
            <text:p>0</text:p>
          </table:table-cell>
          <table:table-cell table:style-name="ce6" table:formula="of:=[.H40]*[.K40]" office:value-type="float" office:value="0" calcext:value-type="float">
            <text:p>0</text:p>
          </table:table-cell>
          <table:table-cell table:formula="of:=[.G40]*[.K40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1]=2;15;IF([.C41]=3;37;IF([.C41]=4;75;IF([.C41]=5;150;IF([.C41]=6;375;IF([.C41]=7;750;0))))))" office:value-type="float" office:value="0" calcext:value-type="float">
            <text:p>0</text:p>
          </table:table-cell>
          <table:table-cell table:number-columns-repeated="2"/>
          <table:table-cell table:formula="of:=[.P41]*28+[.Q41]*22+[.R41]*100+[.S41]*18+[.T41]*35+[.U41]*22+[.V41]*100+[.W41]*18+[.X41]*80+[.Y41]*1100+[.Z41]*200+[.AA41]*100+[.AB41]*32+[.AC41]*1700+[.AD41]*850+[.AE41]*200+[.AF41]*400+[.AG41]*70+[.AH41]*300+[.AI41]*450+[.AJ41]*1100+[.AK41]*500+[.AL41]*60+[.AM41]*600+[.AN41]*20+[.AO41]*60+[.AP41]*20+[.AQ41]*100+[.AR41]*900+[.AS41]*1300+[.AT41]*2500+[.AU41]*900+[.AV41]*1200+[.AW41]*1500+[.AX41]*110+[.AY41]*130+[.AZ41]*50+[.BA41]*600+[.BB41]*5500+[.BC41]*70000+[.BD41]*90000" office:value-type="float" office:value="0" calcext:value-type="float">
            <text:p>0</text:p>
          </table:table-cell>
          <table:table-cell table:style-name="ce2" table:formula="of:=[.G41]-[.F41]" office:value-type="float" office:value="0" calcext:value-type="float">
            <text:p>0</text:p>
          </table:table-cell>
          <table:table-cell table:style-name="ce3" table:formula="of:=IF([.F41]=0;&quot;&quot;;[.G41]/[.F41])">
            <text:p/>
          </table:table-cell>
          <table:table-cell table:formula="of:=IF([.G41]=0;&quot;&quot;;[.E41]*[.F41]/[.G41])">
            <text:p/>
          </table:table-cell>
          <table:table-cell table:style-name="ce5"/>
          <table:table-cell table:formula="of:=[.D41]*[.K41]" office:value-type="float" office:value="0" calcext:value-type="float">
            <text:p>0</text:p>
          </table:table-cell>
          <table:table-cell table:formula="of:=[.F41]*[.K41]" office:value-type="float" office:value="0" calcext:value-type="float">
            <text:p>0</text:p>
          </table:table-cell>
          <table:table-cell table:style-name="ce6" table:formula="of:=[.H41]*[.K41]" office:value-type="float" office:value="0" calcext:value-type="float">
            <text:p>0</text:p>
          </table:table-cell>
          <table:table-cell table:formula="of:=[.G41]*[.K41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2]=2;15;IF([.C42]=3;37;IF([.C42]=4;75;IF([.C42]=5;150;IF([.C42]=6;375;IF([.C42]=7;750;0))))))" office:value-type="float" office:value="0" calcext:value-type="float">
            <text:p>0</text:p>
          </table:table-cell>
          <table:table-cell table:number-columns-repeated="2"/>
          <table:table-cell table:formula="of:=[.P42]*28+[.Q42]*22+[.R42]*100+[.S42]*18+[.T42]*35+[.U42]*22+[.V42]*100+[.W42]*18+[.X42]*80+[.Y42]*1100+[.Z42]*200+[.AA42]*100+[.AB42]*32+[.AC42]*1700+[.AD42]*850+[.AE42]*200+[.AF42]*400+[.AG42]*70+[.AH42]*300+[.AI42]*450+[.AJ42]*1100+[.AK42]*500+[.AL42]*60+[.AM42]*600+[.AN42]*20+[.AO42]*60+[.AP42]*20+[.AQ42]*100+[.AR42]*900+[.AS42]*1300+[.AT42]*2500+[.AU42]*900+[.AV42]*1200+[.AW42]*1500+[.AX42]*110+[.AY42]*130+[.AZ42]*50+[.BA42]*600+[.BB42]*5500+[.BC42]*70000+[.BD42]*90000" office:value-type="float" office:value="0" calcext:value-type="float">
            <text:p>0</text:p>
          </table:table-cell>
          <table:table-cell table:style-name="ce2" table:formula="of:=[.G42]-[.F42]" office:value-type="float" office:value="0" calcext:value-type="float">
            <text:p>0</text:p>
          </table:table-cell>
          <table:table-cell table:style-name="ce3" table:formula="of:=IF([.F42]=0;&quot;&quot;;[.G42]/[.F42])">
            <text:p/>
          </table:table-cell>
          <table:table-cell table:formula="of:=IF([.G42]=0;&quot;&quot;;[.E42]*[.F42]/[.G42])">
            <text:p/>
          </table:table-cell>
          <table:table-cell table:style-name="ce5"/>
          <table:table-cell table:formula="of:=[.D42]*[.K42]" office:value-type="float" office:value="0" calcext:value-type="float">
            <text:p>0</text:p>
          </table:table-cell>
          <table:table-cell table:formula="of:=[.F42]*[.K42]" office:value-type="float" office:value="0" calcext:value-type="float">
            <text:p>0</text:p>
          </table:table-cell>
          <table:table-cell table:style-name="ce6" table:formula="of:=[.H42]*[.K42]" office:value-type="float" office:value="0" calcext:value-type="float">
            <text:p>0</text:p>
          </table:table-cell>
          <table:table-cell table:formula="of:=[.G42]*[.K42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3]=2;15;IF([.C43]=3;37;IF([.C43]=4;75;IF([.C43]=5;150;IF([.C43]=6;375;IF([.C43]=7;750;0))))))" office:value-type="float" office:value="0" calcext:value-type="float">
            <text:p>0</text:p>
          </table:table-cell>
          <table:table-cell table:number-columns-repeated="2"/>
          <table:table-cell table:formula="of:=[.P43]*28+[.Q43]*22+[.R43]*100+[.S43]*18+[.T43]*35+[.U43]*22+[.V43]*100+[.W43]*18+[.X43]*80+[.Y43]*1100+[.Z43]*200+[.AA43]*100+[.AB43]*32+[.AC43]*1700+[.AD43]*850+[.AE43]*200+[.AF43]*400+[.AG43]*70+[.AH43]*300+[.AI43]*450+[.AJ43]*1100+[.AK43]*500+[.AL43]*60+[.AM43]*600+[.AN43]*20+[.AO43]*60+[.AP43]*20+[.AQ43]*100+[.AR43]*900+[.AS43]*1300+[.AT43]*2500+[.AU43]*900+[.AV43]*1200+[.AW43]*1500+[.AX43]*110+[.AY43]*130+[.AZ43]*50+[.BA43]*600+[.BB43]*5500+[.BC43]*70000+[.BD43]*90000" office:value-type="float" office:value="0" calcext:value-type="float">
            <text:p>0</text:p>
          </table:table-cell>
          <table:table-cell table:style-name="ce2" table:formula="of:=[.G43]-[.F43]" office:value-type="float" office:value="0" calcext:value-type="float">
            <text:p>0</text:p>
          </table:table-cell>
          <table:table-cell table:style-name="ce3" table:formula="of:=IF([.F43]=0;&quot;&quot;;[.G43]/[.F43])">
            <text:p/>
          </table:table-cell>
          <table:table-cell table:formula="of:=IF([.G43]=0;&quot;&quot;;[.E43]*[.F43]/[.G43])">
            <text:p/>
          </table:table-cell>
          <table:table-cell table:style-name="ce5"/>
          <table:table-cell table:formula="of:=[.D43]*[.K43]" office:value-type="float" office:value="0" calcext:value-type="float">
            <text:p>0</text:p>
          </table:table-cell>
          <table:table-cell table:formula="of:=[.F43]*[.K43]" office:value-type="float" office:value="0" calcext:value-type="float">
            <text:p>0</text:p>
          </table:table-cell>
          <table:table-cell table:style-name="ce6" table:formula="of:=[.H43]*[.K43]" office:value-type="float" office:value="0" calcext:value-type="float">
            <text:p>0</text:p>
          </table:table-cell>
          <table:table-cell table:formula="of:=[.G43]*[.K43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4]=2;15;IF([.C44]=3;37;IF([.C44]=4;75;IF([.C44]=5;150;IF([.C44]=6;375;IF([.C44]=7;750;0))))))" office:value-type="float" office:value="0" calcext:value-type="float">
            <text:p>0</text:p>
          </table:table-cell>
          <table:table-cell table:number-columns-repeated="2"/>
          <table:table-cell table:formula="of:=[.P44]*28+[.Q44]*22+[.R44]*100+[.S44]*18+[.T44]*35+[.U44]*22+[.V44]*100+[.W44]*18+[.X44]*80+[.Y44]*1100+[.Z44]*200+[.AA44]*100+[.AB44]*32+[.AC44]*1700+[.AD44]*850+[.AE44]*200+[.AF44]*400+[.AG44]*70+[.AH44]*300+[.AI44]*450+[.AJ44]*1100+[.AK44]*500+[.AL44]*60+[.AM44]*600+[.AN44]*20+[.AO44]*60+[.AP44]*20+[.AQ44]*100+[.AR44]*900+[.AS44]*1300+[.AT44]*2500+[.AU44]*900+[.AV44]*1200+[.AW44]*1500+[.AX44]*110+[.AY44]*130+[.AZ44]*50+[.BA44]*600+[.BB44]*5500+[.BC44]*70000+[.BD44]*90000" office:value-type="float" office:value="0" calcext:value-type="float">
            <text:p>0</text:p>
          </table:table-cell>
          <table:table-cell table:style-name="ce2" table:formula="of:=[.G44]-[.F44]" office:value-type="float" office:value="0" calcext:value-type="float">
            <text:p>0</text:p>
          </table:table-cell>
          <table:table-cell table:style-name="ce3" table:formula="of:=IF([.F44]=0;&quot;&quot;;[.G44]/[.F44])">
            <text:p/>
          </table:table-cell>
          <table:table-cell table:formula="of:=IF([.G44]=0;&quot;&quot;;[.E44]*[.F44]/[.G44])">
            <text:p/>
          </table:table-cell>
          <table:table-cell table:style-name="ce5"/>
          <table:table-cell table:formula="of:=[.D44]*[.K44]" office:value-type="float" office:value="0" calcext:value-type="float">
            <text:p>0</text:p>
          </table:table-cell>
          <table:table-cell table:formula="of:=[.F44]*[.K44]" office:value-type="float" office:value="0" calcext:value-type="float">
            <text:p>0</text:p>
          </table:table-cell>
          <table:table-cell table:style-name="ce6" table:formula="of:=[.H44]*[.K44]" office:value-type="float" office:value="0" calcext:value-type="float">
            <text:p>0</text:p>
          </table:table-cell>
          <table:table-cell table:formula="of:=[.G44]*[.K44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5]=2;15;IF([.C45]=3;37;IF([.C45]=4;75;IF([.C45]=5;150;IF([.C45]=6;375;IF([.C45]=7;750;0))))))" office:value-type="float" office:value="0" calcext:value-type="float">
            <text:p>0</text:p>
          </table:table-cell>
          <table:table-cell table:number-columns-repeated="2"/>
          <table:table-cell table:formula="of:=[.P45]*28+[.Q45]*22+[.R45]*100+[.S45]*18+[.T45]*35+[.U45]*22+[.V45]*100+[.W45]*18+[.X45]*80+[.Y45]*1100+[.Z45]*200+[.AA45]*100+[.AB45]*32+[.AC45]*1700+[.AD45]*850+[.AE45]*200+[.AF45]*400+[.AG45]*70+[.AH45]*300+[.AI45]*450+[.AJ45]*1100+[.AK45]*500+[.AL45]*60+[.AM45]*600+[.AN45]*20+[.AO45]*60+[.AP45]*20+[.AQ45]*100+[.AR45]*900+[.AS45]*1300+[.AT45]*2500+[.AU45]*900+[.AV45]*1200+[.AW45]*1500+[.AX45]*110+[.AY45]*130+[.AZ45]*50+[.BA45]*600+[.BB45]*5500+[.BC45]*70000+[.BD45]*90000" office:value-type="float" office:value="0" calcext:value-type="float">
            <text:p>0</text:p>
          </table:table-cell>
          <table:table-cell table:style-name="ce2" table:formula="of:=[.G45]-[.F45]" office:value-type="float" office:value="0" calcext:value-type="float">
            <text:p>0</text:p>
          </table:table-cell>
          <table:table-cell table:style-name="ce3" table:formula="of:=IF([.F45]=0;&quot;&quot;;[.G45]/[.F45])">
            <text:p/>
          </table:table-cell>
          <table:table-cell table:formula="of:=IF([.G45]=0;&quot;&quot;;[.E45]*[.F45]/[.G45])">
            <text:p/>
          </table:table-cell>
          <table:table-cell table:style-name="ce5"/>
          <table:table-cell table:formula="of:=[.D45]*[.K45]" office:value-type="float" office:value="0" calcext:value-type="float">
            <text:p>0</text:p>
          </table:table-cell>
          <table:table-cell table:formula="of:=[.F45]*[.K45]" office:value-type="float" office:value="0" calcext:value-type="float">
            <text:p>0</text:p>
          </table:table-cell>
          <table:table-cell table:style-name="ce6" table:formula="of:=[.H45]*[.K45]" office:value-type="float" office:value="0" calcext:value-type="float">
            <text:p>0</text:p>
          </table:table-cell>
          <table:table-cell table:formula="of:=[.G45]*[.K45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6]=2;15;IF([.C46]=3;37;IF([.C46]=4;75;IF([.C46]=5;150;IF([.C46]=6;375;IF([.C46]=7;750;0))))))" office:value-type="float" office:value="0" calcext:value-type="float">
            <text:p>0</text:p>
          </table:table-cell>
          <table:table-cell table:number-columns-repeated="2"/>
          <table:table-cell table:formula="of:=[.P46]*28+[.Q46]*22+[.R46]*100+[.S46]*18+[.T46]*35+[.U46]*22+[.V46]*100+[.W46]*18+[.X46]*80+[.Y46]*1100+[.Z46]*200+[.AA46]*100+[.AB46]*32+[.AC46]*1700+[.AD46]*850+[.AE46]*200+[.AF46]*400+[.AG46]*70+[.AH46]*300+[.AI46]*450+[.AJ46]*1100+[.AK46]*500+[.AL46]*60+[.AM46]*600+[.AN46]*20+[.AO46]*60+[.AP46]*20+[.AQ46]*100+[.AR46]*900+[.AS46]*1300+[.AT46]*2500+[.AU46]*900+[.AV46]*1200+[.AW46]*1500+[.AX46]*110+[.AY46]*130+[.AZ46]*50+[.BA46]*600+[.BB46]*5500+[.BC46]*70000+[.BD46]*90000" office:value-type="float" office:value="0" calcext:value-type="float">
            <text:p>0</text:p>
          </table:table-cell>
          <table:table-cell table:style-name="ce2" table:formula="of:=[.G46]-[.F46]" office:value-type="float" office:value="0" calcext:value-type="float">
            <text:p>0</text:p>
          </table:table-cell>
          <table:table-cell table:style-name="ce3" table:formula="of:=IF([.F46]=0;&quot;&quot;;[.G46]/[.F46])">
            <text:p/>
          </table:table-cell>
          <table:table-cell table:formula="of:=IF([.G46]=0;&quot;&quot;;[.E46]*[.F46]/[.G46])">
            <text:p/>
          </table:table-cell>
          <table:table-cell table:style-name="ce5"/>
          <table:table-cell table:formula="of:=[.D46]*[.K46]" office:value-type="float" office:value="0" calcext:value-type="float">
            <text:p>0</text:p>
          </table:table-cell>
          <table:table-cell table:formula="of:=[.F46]*[.K46]" office:value-type="float" office:value="0" calcext:value-type="float">
            <text:p>0</text:p>
          </table:table-cell>
          <table:table-cell table:style-name="ce6" table:formula="of:=[.H46]*[.K46]" office:value-type="float" office:value="0" calcext:value-type="float">
            <text:p>0</text:p>
          </table:table-cell>
          <table:table-cell table:formula="of:=[.G46]*[.K46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7]=2;15;IF([.C47]=3;37;IF([.C47]=4;75;IF([.C47]=5;150;IF([.C47]=6;375;IF([.C47]=7;750;0))))))" office:value-type="float" office:value="0" calcext:value-type="float">
            <text:p>0</text:p>
          </table:table-cell>
          <table:table-cell table:number-columns-repeated="2"/>
          <table:table-cell table:formula="of:=[.P47]*28+[.Q47]*22+[.R47]*100+[.S47]*18+[.T47]*35+[.U47]*22+[.V47]*100+[.W47]*18+[.X47]*80+[.Y47]*1100+[.Z47]*200+[.AA47]*100+[.AB47]*32+[.AC47]*1700+[.AD47]*850+[.AE47]*200+[.AF47]*400+[.AG47]*70+[.AH47]*300+[.AI47]*450+[.AJ47]*1100+[.AK47]*500+[.AL47]*60+[.AM47]*600+[.AN47]*20+[.AO47]*60+[.AP47]*20+[.AQ47]*100+[.AR47]*900+[.AS47]*1300+[.AT47]*2500+[.AU47]*900+[.AV47]*1200+[.AW47]*1500+[.AX47]*110+[.AY47]*130+[.AZ47]*50+[.BA47]*600+[.BB47]*5500+[.BC47]*70000+[.BD47]*90000" office:value-type="float" office:value="0" calcext:value-type="float">
            <text:p>0</text:p>
          </table:table-cell>
          <table:table-cell table:style-name="ce2" table:formula="of:=[.G47]-[.F47]" office:value-type="float" office:value="0" calcext:value-type="float">
            <text:p>0</text:p>
          </table:table-cell>
          <table:table-cell table:style-name="ce3" table:formula="of:=IF([.F47]=0;&quot;&quot;;[.G47]/[.F47])">
            <text:p/>
          </table:table-cell>
          <table:table-cell table:formula="of:=IF([.G47]=0;&quot;&quot;;[.E47]*[.F47]/[.G47])">
            <text:p/>
          </table:table-cell>
          <table:table-cell table:style-name="ce5"/>
          <table:table-cell table:formula="of:=[.D47]*[.K47]" office:value-type="float" office:value="0" calcext:value-type="float">
            <text:p>0</text:p>
          </table:table-cell>
          <table:table-cell table:formula="of:=[.F47]*[.K47]" office:value-type="float" office:value="0" calcext:value-type="float">
            <text:p>0</text:p>
          </table:table-cell>
          <table:table-cell table:style-name="ce6" table:formula="of:=[.H47]*[.K47]" office:value-type="float" office:value="0" calcext:value-type="float">
            <text:p>0</text:p>
          </table:table-cell>
          <table:table-cell table:formula="of:=[.G47]*[.K47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8]=2;15;IF([.C48]=3;37;IF([.C48]=4;75;IF([.C48]=5;150;IF([.C48]=6;375;IF([.C48]=7;750;0))))))" office:value-type="float" office:value="0" calcext:value-type="float">
            <text:p>0</text:p>
          </table:table-cell>
          <table:table-cell table:number-columns-repeated="2"/>
          <table:table-cell table:formula="of:=[.P48]*28+[.Q48]*22+[.R48]*100+[.S48]*18+[.T48]*35+[.U48]*22+[.V48]*100+[.W48]*18+[.X48]*80+[.Y48]*1100+[.Z48]*200+[.AA48]*100+[.AB48]*32+[.AC48]*1700+[.AD48]*850+[.AE48]*200+[.AF48]*400+[.AG48]*70+[.AH48]*300+[.AI48]*450+[.AJ48]*1100+[.AK48]*500+[.AL48]*60+[.AM48]*600+[.AN48]*20+[.AO48]*60+[.AP48]*20+[.AQ48]*100+[.AR48]*900+[.AS48]*1300+[.AT48]*2500+[.AU48]*900+[.AV48]*1200+[.AW48]*1500+[.AX48]*110+[.AY48]*130+[.AZ48]*50+[.BA48]*600+[.BB48]*5500+[.BC48]*70000+[.BD48]*90000" office:value-type="float" office:value="0" calcext:value-type="float">
            <text:p>0</text:p>
          </table:table-cell>
          <table:table-cell table:style-name="ce2" table:formula="of:=[.G48]-[.F48]" office:value-type="float" office:value="0" calcext:value-type="float">
            <text:p>0</text:p>
          </table:table-cell>
          <table:table-cell table:style-name="ce3" table:formula="of:=IF([.F48]=0;&quot;&quot;;[.G48]/[.F48])">
            <text:p/>
          </table:table-cell>
          <table:table-cell table:formula="of:=IF([.G48]=0;&quot;&quot;;[.E48]*[.F48]/[.G48])">
            <text:p/>
          </table:table-cell>
          <table:table-cell table:style-name="ce5"/>
          <table:table-cell table:formula="of:=[.D48]*[.K48]" office:value-type="float" office:value="0" calcext:value-type="float">
            <text:p>0</text:p>
          </table:table-cell>
          <table:table-cell table:formula="of:=[.F48]*[.K48]" office:value-type="float" office:value="0" calcext:value-type="float">
            <text:p>0</text:p>
          </table:table-cell>
          <table:table-cell table:style-name="ce6" table:formula="of:=[.H48]*[.K48]" office:value-type="float" office:value="0" calcext:value-type="float">
            <text:p>0</text:p>
          </table:table-cell>
          <table:table-cell table:formula="of:=[.G48]*[.K48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49]=2;15;IF([.C49]=3;37;IF([.C49]=4;75;IF([.C49]=5;150;IF([.C49]=6;375;IF([.C49]=7;750;0))))))" office:value-type="float" office:value="0" calcext:value-type="float">
            <text:p>0</text:p>
          </table:table-cell>
          <table:table-cell table:number-columns-repeated="2"/>
          <table:table-cell table:formula="of:=[.P49]*28+[.Q49]*22+[.R49]*100+[.S49]*18+[.T49]*35+[.U49]*22+[.V49]*100+[.W49]*18+[.X49]*80+[.Y49]*1100+[.Z49]*200+[.AA49]*100+[.AB49]*32+[.AC49]*1700+[.AD49]*850+[.AE49]*200+[.AF49]*400+[.AG49]*70+[.AH49]*300+[.AI49]*450+[.AJ49]*1100+[.AK49]*500+[.AL49]*60+[.AM49]*600+[.AN49]*20+[.AO49]*60+[.AP49]*20+[.AQ49]*100+[.AR49]*900+[.AS49]*1300+[.AT49]*2500+[.AU49]*900+[.AV49]*1200+[.AW49]*1500+[.AX49]*110+[.AY49]*130+[.AZ49]*50+[.BA49]*600+[.BB49]*5500+[.BC49]*70000+[.BD49]*90000" office:value-type="float" office:value="0" calcext:value-type="float">
            <text:p>0</text:p>
          </table:table-cell>
          <table:table-cell table:style-name="ce2" table:formula="of:=[.G49]-[.F49]" office:value-type="float" office:value="0" calcext:value-type="float">
            <text:p>0</text:p>
          </table:table-cell>
          <table:table-cell table:style-name="ce3" table:formula="of:=IF([.F49]=0;&quot;&quot;;[.G49]/[.F49])">
            <text:p/>
          </table:table-cell>
          <table:table-cell table:formula="of:=IF([.G49]=0;&quot;&quot;;[.E49]*[.F49]/[.G49])">
            <text:p/>
          </table:table-cell>
          <table:table-cell table:style-name="ce5"/>
          <table:table-cell table:formula="of:=[.D49]*[.K49]" office:value-type="float" office:value="0" calcext:value-type="float">
            <text:p>0</text:p>
          </table:table-cell>
          <table:table-cell table:formula="of:=[.F49]*[.K49]" office:value-type="float" office:value="0" calcext:value-type="float">
            <text:p>0</text:p>
          </table:table-cell>
          <table:table-cell table:style-name="ce6" table:formula="of:=[.H49]*[.K49]" office:value-type="float" office:value="0" calcext:value-type="float">
            <text:p>0</text:p>
          </table:table-cell>
          <table:table-cell table:formula="of:=[.G49]*[.K49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0]=2;15;IF([.C50]=3;37;IF([.C50]=4;75;IF([.C50]=5;150;IF([.C50]=6;375;IF([.C50]=7;750;0))))))" office:value-type="float" office:value="0" calcext:value-type="float">
            <text:p>0</text:p>
          </table:table-cell>
          <table:table-cell table:number-columns-repeated="2"/>
          <table:table-cell table:formula="of:=[.P50]*28+[.Q50]*22+[.R50]*100+[.S50]*18+[.T50]*35+[.U50]*22+[.V50]*100+[.W50]*18+[.X50]*80+[.Y50]*1100+[.Z50]*200+[.AA50]*100+[.AB50]*32+[.AC50]*1700+[.AD50]*850+[.AE50]*200+[.AF50]*400+[.AG50]*70+[.AH50]*300+[.AI50]*450+[.AJ50]*1100+[.AK50]*500+[.AL50]*60+[.AM50]*600+[.AN50]*20+[.AO50]*60+[.AP50]*20+[.AQ50]*100+[.AR50]*900+[.AS50]*1300+[.AT50]*2500+[.AU50]*900+[.AV50]*1200+[.AW50]*1500+[.AX50]*110+[.AY50]*130+[.AZ50]*50+[.BA50]*600+[.BB50]*5500+[.BC50]*70000+[.BD50]*90000" office:value-type="float" office:value="0" calcext:value-type="float">
            <text:p>0</text:p>
          </table:table-cell>
          <table:table-cell table:style-name="ce2" table:formula="of:=[.G50]-[.F50]" office:value-type="float" office:value="0" calcext:value-type="float">
            <text:p>0</text:p>
          </table:table-cell>
          <table:table-cell table:style-name="ce3" table:formula="of:=IF([.F50]=0;&quot;&quot;;[.G50]/[.F50])">
            <text:p/>
          </table:table-cell>
          <table:table-cell table:formula="of:=IF([.G50]=0;&quot;&quot;;[.E50]*[.F50]/[.G50])">
            <text:p/>
          </table:table-cell>
          <table:table-cell table:style-name="ce5"/>
          <table:table-cell table:formula="of:=[.D50]*[.K50]" office:value-type="float" office:value="0" calcext:value-type="float">
            <text:p>0</text:p>
          </table:table-cell>
          <table:table-cell table:formula="of:=[.F50]*[.K50]" office:value-type="float" office:value="0" calcext:value-type="float">
            <text:p>0</text:p>
          </table:table-cell>
          <table:table-cell table:style-name="ce6" table:formula="of:=[.H50]*[.K50]" office:value-type="float" office:value="0" calcext:value-type="float">
            <text:p>0</text:p>
          </table:table-cell>
          <table:table-cell table:formula="of:=[.G50]*[.K50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1]=2;15;IF([.C51]=3;37;IF([.C51]=4;75;IF([.C51]=5;150;IF([.C51]=6;375;IF([.C51]=7;750;0))))))" office:value-type="float" office:value="0" calcext:value-type="float">
            <text:p>0</text:p>
          </table:table-cell>
          <table:table-cell table:number-columns-repeated="2"/>
          <table:table-cell table:formula="of:=[.P51]*28+[.Q51]*22+[.R51]*100+[.S51]*18+[.T51]*35+[.U51]*22+[.V51]*100+[.W51]*18+[.X51]*80+[.Y51]*1100+[.Z51]*200+[.AA51]*100+[.AB51]*32+[.AC51]*1700+[.AD51]*850+[.AE51]*200+[.AF51]*400+[.AG51]*70+[.AH51]*300+[.AI51]*450+[.AJ51]*1100+[.AK51]*500+[.AL51]*60+[.AM51]*600+[.AN51]*20+[.AO51]*60+[.AP51]*20+[.AQ51]*100+[.AR51]*900+[.AS51]*1300+[.AT51]*2500+[.AU51]*900+[.AV51]*1200+[.AW51]*1500+[.AX51]*110+[.AY51]*130+[.AZ51]*50+[.BA51]*600+[.BB51]*5500+[.BC51]*70000+[.BD51]*90000" office:value-type="float" office:value="0" calcext:value-type="float">
            <text:p>0</text:p>
          </table:table-cell>
          <table:table-cell table:style-name="ce2" table:formula="of:=[.G51]-[.F51]" office:value-type="float" office:value="0" calcext:value-type="float">
            <text:p>0</text:p>
          </table:table-cell>
          <table:table-cell table:style-name="ce3" table:formula="of:=IF([.F51]=0;&quot;&quot;;[.G51]/[.F51])">
            <text:p/>
          </table:table-cell>
          <table:table-cell table:formula="of:=IF([.G51]=0;&quot;&quot;;[.E51]*[.F51]/[.G51])">
            <text:p/>
          </table:table-cell>
          <table:table-cell table:style-name="ce5"/>
          <table:table-cell table:formula="of:=[.D51]*[.K51]" office:value-type="float" office:value="0" calcext:value-type="float">
            <text:p>0</text:p>
          </table:table-cell>
          <table:table-cell table:formula="of:=[.F51]*[.K51]" office:value-type="float" office:value="0" calcext:value-type="float">
            <text:p>0</text:p>
          </table:table-cell>
          <table:table-cell table:style-name="ce6" table:formula="of:=[.H51]*[.K51]" office:value-type="float" office:value="0" calcext:value-type="float">
            <text:p>0</text:p>
          </table:table-cell>
          <table:table-cell table:formula="of:=[.G51]*[.K51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2]=2;15;IF([.C52]=3;37;IF([.C52]=4;75;IF([.C52]=5;150;IF([.C52]=6;375;IF([.C52]=7;750;0))))))" office:value-type="float" office:value="0" calcext:value-type="float">
            <text:p>0</text:p>
          </table:table-cell>
          <table:table-cell table:number-columns-repeated="2"/>
          <table:table-cell table:formula="of:=[.P52]*28+[.Q52]*22+[.R52]*100+[.S52]*18+[.T52]*35+[.U52]*22+[.V52]*100+[.W52]*18+[.X52]*80+[.Y52]*1100+[.Z52]*200+[.AA52]*100+[.AB52]*32+[.AC52]*1700+[.AD52]*850+[.AE52]*200+[.AF52]*400+[.AG52]*70+[.AH52]*300+[.AI52]*450+[.AJ52]*1100+[.AK52]*500+[.AL52]*60+[.AM52]*600+[.AN52]*20+[.AO52]*60+[.AP52]*20+[.AQ52]*100+[.AR52]*900+[.AS52]*1300+[.AT52]*2500+[.AU52]*900+[.AV52]*1200+[.AW52]*1500+[.AX52]*110+[.AY52]*130+[.AZ52]*50+[.BA52]*600+[.BB52]*5500+[.BC52]*70000+[.BD52]*90000" office:value-type="float" office:value="0" calcext:value-type="float">
            <text:p>0</text:p>
          </table:table-cell>
          <table:table-cell table:style-name="ce2" table:formula="of:=[.G52]-[.F52]" office:value-type="float" office:value="0" calcext:value-type="float">
            <text:p>0</text:p>
          </table:table-cell>
          <table:table-cell table:style-name="ce3" table:formula="of:=IF([.F52]=0;&quot;&quot;;[.G52]/[.F52])">
            <text:p/>
          </table:table-cell>
          <table:table-cell table:formula="of:=IF([.G52]=0;&quot;&quot;;[.E52]*[.F52]/[.G52])">
            <text:p/>
          </table:table-cell>
          <table:table-cell table:style-name="ce5"/>
          <table:table-cell table:formula="of:=[.D52]*[.K52]" office:value-type="float" office:value="0" calcext:value-type="float">
            <text:p>0</text:p>
          </table:table-cell>
          <table:table-cell table:formula="of:=[.F52]*[.K52]" office:value-type="float" office:value="0" calcext:value-type="float">
            <text:p>0</text:p>
          </table:table-cell>
          <table:table-cell table:style-name="ce6" table:formula="of:=[.H52]*[.K52]" office:value-type="float" office:value="0" calcext:value-type="float">
            <text:p>0</text:p>
          </table:table-cell>
          <table:table-cell table:formula="of:=[.G52]*[.K52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3]=2;15;IF([.C53]=3;37;IF([.C53]=4;75;IF([.C53]=5;150;IF([.C53]=6;375;IF([.C53]=7;750;0))))))" office:value-type="float" office:value="0" calcext:value-type="float">
            <text:p>0</text:p>
          </table:table-cell>
          <table:table-cell table:number-columns-repeated="2"/>
          <table:table-cell table:formula="of:=[.P53]*28+[.Q53]*22+[.R53]*100+[.S53]*18+[.T53]*35+[.U53]*22+[.V53]*100+[.W53]*18+[.X53]*80+[.Y53]*1100+[.Z53]*200+[.AA53]*100+[.AB53]*32+[.AC53]*1700+[.AD53]*850+[.AE53]*200+[.AF53]*400+[.AG53]*70+[.AH53]*300+[.AI53]*450+[.AJ53]*1100+[.AK53]*500+[.AL53]*60+[.AM53]*600+[.AN53]*20+[.AO53]*60+[.AP53]*20+[.AQ53]*100+[.AR53]*900+[.AS53]*1300+[.AT53]*2500+[.AU53]*900+[.AV53]*1200+[.AW53]*1500+[.AX53]*110+[.AY53]*130+[.AZ53]*50+[.BA53]*600+[.BB53]*5500+[.BC53]*70000+[.BD53]*90000" office:value-type="float" office:value="0" calcext:value-type="float">
            <text:p>0</text:p>
          </table:table-cell>
          <table:table-cell table:style-name="ce2" table:formula="of:=[.G53]-[.F53]" office:value-type="float" office:value="0" calcext:value-type="float">
            <text:p>0</text:p>
          </table:table-cell>
          <table:table-cell table:style-name="ce3" table:formula="of:=IF([.F53]=0;&quot;&quot;;[.G53]/[.F53])">
            <text:p/>
          </table:table-cell>
          <table:table-cell table:formula="of:=IF([.G53]=0;&quot;&quot;;[.E53]*[.F53]/[.G53])">
            <text:p/>
          </table:table-cell>
          <table:table-cell table:style-name="ce5"/>
          <table:table-cell table:formula="of:=[.D53]*[.K53]" office:value-type="float" office:value="0" calcext:value-type="float">
            <text:p>0</text:p>
          </table:table-cell>
          <table:table-cell table:formula="of:=[.F53]*[.K53]" office:value-type="float" office:value="0" calcext:value-type="float">
            <text:p>0</text:p>
          </table:table-cell>
          <table:table-cell table:style-name="ce6" table:formula="of:=[.H53]*[.K53]" office:value-type="float" office:value="0" calcext:value-type="float">
            <text:p>0</text:p>
          </table:table-cell>
          <table:table-cell table:formula="of:=[.G53]*[.K53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4]=2;15;IF([.C54]=3;37;IF([.C54]=4;75;IF([.C54]=5;150;IF([.C54]=6;375;IF([.C54]=7;750;0))))))" office:value-type="float" office:value="0" calcext:value-type="float">
            <text:p>0</text:p>
          </table:table-cell>
          <table:table-cell table:number-columns-repeated="2"/>
          <table:table-cell table:formula="of:=[.P54]*28+[.Q54]*22+[.R54]*100+[.S54]*18+[.T54]*35+[.U54]*22+[.V54]*100+[.W54]*18+[.X54]*80+[.Y54]*1100+[.Z54]*200+[.AA54]*100+[.AB54]*32+[.AC54]*1700+[.AD54]*850+[.AE54]*200+[.AF54]*400+[.AG54]*70+[.AH54]*300+[.AI54]*450+[.AJ54]*1100+[.AK54]*500+[.AL54]*60+[.AM54]*600+[.AN54]*20+[.AO54]*60+[.AP54]*20+[.AQ54]*100+[.AR54]*900+[.AS54]*1300+[.AT54]*2500+[.AU54]*900+[.AV54]*1200+[.AW54]*1500+[.AX54]*110+[.AY54]*130+[.AZ54]*50+[.BA54]*600+[.BB54]*5500+[.BC54]*70000+[.BD54]*90000" office:value-type="float" office:value="0" calcext:value-type="float">
            <text:p>0</text:p>
          </table:table-cell>
          <table:table-cell table:style-name="ce2" table:formula="of:=[.G54]-[.F54]" office:value-type="float" office:value="0" calcext:value-type="float">
            <text:p>0</text:p>
          </table:table-cell>
          <table:table-cell table:style-name="ce3" table:formula="of:=IF([.F54]=0;&quot;&quot;;[.G54]/[.F54])">
            <text:p/>
          </table:table-cell>
          <table:table-cell table:formula="of:=IF([.G54]=0;&quot;&quot;;[.E54]*[.F54]/[.G54])">
            <text:p/>
          </table:table-cell>
          <table:table-cell table:style-name="ce5"/>
          <table:table-cell table:formula="of:=[.D54]*[.K54]" office:value-type="float" office:value="0" calcext:value-type="float">
            <text:p>0</text:p>
          </table:table-cell>
          <table:table-cell table:formula="of:=[.F54]*[.K54]" office:value-type="float" office:value="0" calcext:value-type="float">
            <text:p>0</text:p>
          </table:table-cell>
          <table:table-cell table:style-name="ce6" table:formula="of:=[.H54]*[.K54]" office:value-type="float" office:value="0" calcext:value-type="float">
            <text:p>0</text:p>
          </table:table-cell>
          <table:table-cell table:formula="of:=[.G54]*[.K54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5]=2;15;IF([.C55]=3;37;IF([.C55]=4;75;IF([.C55]=5;150;IF([.C55]=6;375;IF([.C55]=7;750;0))))))" office:value-type="float" office:value="0" calcext:value-type="float">
            <text:p>0</text:p>
          </table:table-cell>
          <table:table-cell table:number-columns-repeated="2"/>
          <table:table-cell table:formula="of:=[.P55]*28+[.Q55]*22+[.R55]*100+[.S55]*18+[.T55]*35+[.U55]*22+[.V55]*100+[.W55]*18+[.X55]*80+[.Y55]*1100+[.Z55]*200+[.AA55]*100+[.AB55]*32+[.AC55]*1700+[.AD55]*850+[.AE55]*200+[.AF55]*400+[.AG55]*70+[.AH55]*300+[.AI55]*450+[.AJ55]*1100+[.AK55]*500+[.AL55]*60+[.AM55]*600+[.AN55]*20+[.AO55]*60+[.AP55]*20+[.AQ55]*100+[.AR55]*900+[.AS55]*1300+[.AT55]*2500+[.AU55]*900+[.AV55]*1200+[.AW55]*1500+[.AX55]*110+[.AY55]*130+[.AZ55]*50+[.BA55]*600+[.BB55]*5500+[.BC55]*70000+[.BD55]*90000" office:value-type="float" office:value="0" calcext:value-type="float">
            <text:p>0</text:p>
          </table:table-cell>
          <table:table-cell table:style-name="ce2" table:formula="of:=[.G55]-[.F55]" office:value-type="float" office:value="0" calcext:value-type="float">
            <text:p>0</text:p>
          </table:table-cell>
          <table:table-cell table:style-name="ce3" table:formula="of:=IF([.F55]=0;&quot;&quot;;[.G55]/[.F55])">
            <text:p/>
          </table:table-cell>
          <table:table-cell table:formula="of:=IF([.G55]=0;&quot;&quot;;[.E55]*[.F55]/[.G55])">
            <text:p/>
          </table:table-cell>
          <table:table-cell table:style-name="ce5"/>
          <table:table-cell table:formula="of:=[.D55]*[.K55]" office:value-type="float" office:value="0" calcext:value-type="float">
            <text:p>0</text:p>
          </table:table-cell>
          <table:table-cell table:formula="of:=[.F55]*[.K55]" office:value-type="float" office:value="0" calcext:value-type="float">
            <text:p>0</text:p>
          </table:table-cell>
          <table:table-cell table:style-name="ce6" table:formula="of:=[.H55]*[.K55]" office:value-type="float" office:value="0" calcext:value-type="float">
            <text:p>0</text:p>
          </table:table-cell>
          <table:table-cell table:formula="of:=[.G55]*[.K55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6]=2;15;IF([.C56]=3;37;IF([.C56]=4;75;IF([.C56]=5;150;IF([.C56]=6;375;IF([.C56]=7;750;0))))))" office:value-type="float" office:value="0" calcext:value-type="float">
            <text:p>0</text:p>
          </table:table-cell>
          <table:table-cell table:number-columns-repeated="2"/>
          <table:table-cell table:formula="of:=[.P56]*28+[.Q56]*22+[.R56]*100+[.S56]*18+[.T56]*35+[.U56]*22+[.V56]*100+[.W56]*18+[.X56]*80+[.Y56]*1100+[.Z56]*200+[.AA56]*100+[.AB56]*32+[.AC56]*1700+[.AD56]*850+[.AE56]*200+[.AF56]*400+[.AG56]*70+[.AH56]*300+[.AI56]*450+[.AJ56]*1100+[.AK56]*500+[.AL56]*60+[.AM56]*600+[.AN56]*20+[.AO56]*60+[.AP56]*20+[.AQ56]*100+[.AR56]*900+[.AS56]*1300+[.AT56]*2500+[.AU56]*900+[.AV56]*1200+[.AW56]*1500+[.AX56]*110+[.AY56]*130+[.AZ56]*50+[.BA56]*600+[.BB56]*5500+[.BC56]*70000+[.BD56]*90000" office:value-type="float" office:value="0" calcext:value-type="float">
            <text:p>0</text:p>
          </table:table-cell>
          <table:table-cell table:style-name="ce2" table:formula="of:=[.G56]-[.F56]" office:value-type="float" office:value="0" calcext:value-type="float">
            <text:p>0</text:p>
          </table:table-cell>
          <table:table-cell table:style-name="ce3" table:formula="of:=IF([.F56]=0;&quot;&quot;;[.G56]/[.F56])">
            <text:p/>
          </table:table-cell>
          <table:table-cell table:formula="of:=IF([.G56]=0;&quot;&quot;;[.E56]*[.F56]/[.G56])">
            <text:p/>
          </table:table-cell>
          <table:table-cell table:style-name="ce5"/>
          <table:table-cell table:formula="of:=[.D56]*[.K56]" office:value-type="float" office:value="0" calcext:value-type="float">
            <text:p>0</text:p>
          </table:table-cell>
          <table:table-cell table:formula="of:=[.F56]*[.K56]" office:value-type="float" office:value="0" calcext:value-type="float">
            <text:p>0</text:p>
          </table:table-cell>
          <table:table-cell table:style-name="ce6" table:formula="of:=[.H56]*[.K56]" office:value-type="float" office:value="0" calcext:value-type="float">
            <text:p>0</text:p>
          </table:table-cell>
          <table:table-cell table:formula="of:=[.G56]*[.K56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7]=2;15;IF([.C57]=3;37;IF([.C57]=4;75;IF([.C57]=5;150;IF([.C57]=6;375;IF([.C57]=7;750;0))))))" office:value-type="float" office:value="0" calcext:value-type="float">
            <text:p>0</text:p>
          </table:table-cell>
          <table:table-cell table:number-columns-repeated="2"/>
          <table:table-cell table:formula="of:=[.P57]*28+[.Q57]*22+[.R57]*100+[.S57]*18+[.T57]*35+[.U57]*22+[.V57]*100+[.W57]*18+[.X57]*80+[.Y57]*1100+[.Z57]*200+[.AA57]*100+[.AB57]*32+[.AC57]*1700+[.AD57]*850+[.AE57]*200+[.AF57]*400+[.AG57]*70+[.AH57]*300+[.AI57]*450+[.AJ57]*1100+[.AK57]*500+[.AL57]*60+[.AM57]*600+[.AN57]*20+[.AO57]*60+[.AP57]*20+[.AQ57]*100+[.AR57]*900+[.AS57]*1300+[.AT57]*2500+[.AU57]*900+[.AV57]*1200+[.AW57]*1500+[.AX57]*110+[.AY57]*130+[.AZ57]*50+[.BA57]*600+[.BB57]*5500+[.BC57]*70000+[.BD57]*90000" office:value-type="float" office:value="0" calcext:value-type="float">
            <text:p>0</text:p>
          </table:table-cell>
          <table:table-cell table:style-name="ce2" table:formula="of:=[.G57]-[.F57]" office:value-type="float" office:value="0" calcext:value-type="float">
            <text:p>0</text:p>
          </table:table-cell>
          <table:table-cell table:style-name="ce3" table:formula="of:=IF([.F57]=0;&quot;&quot;;[.G57]/[.F57])">
            <text:p/>
          </table:table-cell>
          <table:table-cell table:formula="of:=IF([.G57]=0;&quot;&quot;;[.E57]*[.F57]/[.G57])">
            <text:p/>
          </table:table-cell>
          <table:table-cell table:style-name="ce5"/>
          <table:table-cell table:formula="of:=[.D57]*[.K57]" office:value-type="float" office:value="0" calcext:value-type="float">
            <text:p>0</text:p>
          </table:table-cell>
          <table:table-cell table:formula="of:=[.F57]*[.K57]" office:value-type="float" office:value="0" calcext:value-type="float">
            <text:p>0</text:p>
          </table:table-cell>
          <table:table-cell table:style-name="ce6" table:formula="of:=[.H57]*[.K57]" office:value-type="float" office:value="0" calcext:value-type="float">
            <text:p>0</text:p>
          </table:table-cell>
          <table:table-cell table:formula="of:=[.G57]*[.K57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8]=2;15;IF([.C58]=3;37;IF([.C58]=4;75;IF([.C58]=5;150;IF([.C58]=6;375;IF([.C58]=7;750;0))))))" office:value-type="float" office:value="0" calcext:value-type="float">
            <text:p>0</text:p>
          </table:table-cell>
          <table:table-cell table:number-columns-repeated="2"/>
          <table:table-cell table:formula="of:=[.P58]*28+[.Q58]*22+[.R58]*100+[.S58]*18+[.T58]*35+[.U58]*22+[.V58]*100+[.W58]*18+[.X58]*80+[.Y58]*1100+[.Z58]*200+[.AA58]*100+[.AB58]*32+[.AC58]*1700+[.AD58]*850+[.AE58]*200+[.AF58]*400+[.AG58]*70+[.AH58]*300+[.AI58]*450+[.AJ58]*1100+[.AK58]*500+[.AL58]*60+[.AM58]*600+[.AN58]*20+[.AO58]*60+[.AP58]*20+[.AQ58]*100+[.AR58]*900+[.AS58]*1300+[.AT58]*2500+[.AU58]*900+[.AV58]*1200+[.AW58]*1500+[.AX58]*110+[.AY58]*130+[.AZ58]*50+[.BA58]*600+[.BB58]*5500+[.BC58]*70000+[.BD58]*90000" office:value-type="float" office:value="0" calcext:value-type="float">
            <text:p>0</text:p>
          </table:table-cell>
          <table:table-cell table:style-name="ce2" table:formula="of:=[.G58]-[.F58]" office:value-type="float" office:value="0" calcext:value-type="float">
            <text:p>0</text:p>
          </table:table-cell>
          <table:table-cell table:style-name="ce3" table:formula="of:=IF([.F58]=0;&quot;&quot;;[.G58]/[.F58])">
            <text:p/>
          </table:table-cell>
          <table:table-cell table:formula="of:=IF([.G58]=0;&quot;&quot;;[.E58]*[.F58]/[.G58])">
            <text:p/>
          </table:table-cell>
          <table:table-cell table:style-name="ce5"/>
          <table:table-cell table:formula="of:=[.D58]*[.K58]" office:value-type="float" office:value="0" calcext:value-type="float">
            <text:p>0</text:p>
          </table:table-cell>
          <table:table-cell table:formula="of:=[.F58]*[.K58]" office:value-type="float" office:value="0" calcext:value-type="float">
            <text:p>0</text:p>
          </table:table-cell>
          <table:table-cell table:style-name="ce6" table:formula="of:=[.H58]*[.K58]" office:value-type="float" office:value="0" calcext:value-type="float">
            <text:p>0</text:p>
          </table:table-cell>
          <table:table-cell table:formula="of:=[.G58]*[.K58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59]=2;15;IF([.C59]=3;37;IF([.C59]=4;75;IF([.C59]=5;150;IF([.C59]=6;375;IF([.C59]=7;750;0))))))" office:value-type="float" office:value="0" calcext:value-type="float">
            <text:p>0</text:p>
          </table:table-cell>
          <table:table-cell table:number-columns-repeated="2"/>
          <table:table-cell table:formula="of:=[.P59]*28+[.Q59]*22+[.R59]*100+[.S59]*18+[.T59]*35+[.U59]*22+[.V59]*100+[.W59]*18+[.X59]*80+[.Y59]*1100+[.Z59]*200+[.AA59]*100+[.AB59]*32+[.AC59]*1700+[.AD59]*850+[.AE59]*200+[.AF59]*400+[.AG59]*70+[.AH59]*300+[.AI59]*450+[.AJ59]*1100+[.AK59]*500+[.AL59]*60+[.AM59]*600+[.AN59]*20+[.AO59]*60+[.AP59]*20+[.AQ59]*100+[.AR59]*900+[.AS59]*1300+[.AT59]*2500+[.AU59]*900+[.AV59]*1200+[.AW59]*1500+[.AX59]*110+[.AY59]*130+[.AZ59]*50+[.BA59]*600+[.BB59]*5500+[.BC59]*70000+[.BD59]*90000" office:value-type="float" office:value="0" calcext:value-type="float">
            <text:p>0</text:p>
          </table:table-cell>
          <table:table-cell table:style-name="ce2" table:formula="of:=[.G59]-[.F59]" office:value-type="float" office:value="0" calcext:value-type="float">
            <text:p>0</text:p>
          </table:table-cell>
          <table:table-cell table:style-name="ce3" table:formula="of:=IF([.F59]=0;&quot;&quot;;[.G59]/[.F59])">
            <text:p/>
          </table:table-cell>
          <table:table-cell table:formula="of:=IF([.G59]=0;&quot;&quot;;[.E59]*[.F59]/[.G59])">
            <text:p/>
          </table:table-cell>
          <table:table-cell table:style-name="ce5"/>
          <table:table-cell table:formula="of:=[.D59]*[.K59]" office:value-type="float" office:value="0" calcext:value-type="float">
            <text:p>0</text:p>
          </table:table-cell>
          <table:table-cell table:formula="of:=[.F59]*[.K59]" office:value-type="float" office:value="0" calcext:value-type="float">
            <text:p>0</text:p>
          </table:table-cell>
          <table:table-cell table:style-name="ce6" table:formula="of:=[.H59]*[.K59]" office:value-type="float" office:value="0" calcext:value-type="float">
            <text:p>0</text:p>
          </table:table-cell>
          <table:table-cell table:formula="of:=[.G59]*[.K59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0]=2;15;IF([.C60]=3;37;IF([.C60]=4;75;IF([.C60]=5;150;IF([.C60]=6;375;IF([.C60]=7;750;0))))))" office:value-type="float" office:value="0" calcext:value-type="float">
            <text:p>0</text:p>
          </table:table-cell>
          <table:table-cell table:number-columns-repeated="2"/>
          <table:table-cell table:formula="of:=[.P60]*28+[.Q60]*22+[.R60]*100+[.S60]*18+[.T60]*35+[.U60]*22+[.V60]*100+[.W60]*18+[.X60]*80+[.Y60]*1100+[.Z60]*200+[.AA60]*100+[.AB60]*32+[.AC60]*1700+[.AD60]*850+[.AE60]*200+[.AF60]*400+[.AG60]*70+[.AH60]*300+[.AI60]*450+[.AJ60]*1100+[.AK60]*500+[.AL60]*60+[.AM60]*600+[.AN60]*20+[.AO60]*60+[.AP60]*20+[.AQ60]*100+[.AR60]*900+[.AS60]*1300+[.AT60]*2500+[.AU60]*900+[.AV60]*1200+[.AW60]*1500+[.AX60]*110+[.AY60]*130+[.AZ60]*50+[.BA60]*600+[.BB60]*5500+[.BC60]*70000+[.BD60]*90000" office:value-type="float" office:value="0" calcext:value-type="float">
            <text:p>0</text:p>
          </table:table-cell>
          <table:table-cell table:style-name="ce2" table:formula="of:=[.G60]-[.F60]" office:value-type="float" office:value="0" calcext:value-type="float">
            <text:p>0</text:p>
          </table:table-cell>
          <table:table-cell table:style-name="ce3" table:formula="of:=IF([.F60]=0;&quot;&quot;;[.G60]/[.F60])">
            <text:p/>
          </table:table-cell>
          <table:table-cell table:formula="of:=IF([.G60]=0;&quot;&quot;;[.E60]*[.F60]/[.G60])">
            <text:p/>
          </table:table-cell>
          <table:table-cell table:style-name="ce5"/>
          <table:table-cell table:formula="of:=[.D60]*[.K60]" office:value-type="float" office:value="0" calcext:value-type="float">
            <text:p>0</text:p>
          </table:table-cell>
          <table:table-cell table:formula="of:=[.F60]*[.K60]" office:value-type="float" office:value="0" calcext:value-type="float">
            <text:p>0</text:p>
          </table:table-cell>
          <table:table-cell table:style-name="ce6" table:formula="of:=[.H60]*[.K60]" office:value-type="float" office:value="0" calcext:value-type="float">
            <text:p>0</text:p>
          </table:table-cell>
          <table:table-cell table:formula="of:=[.G60]*[.K60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1]=2;15;IF([.C61]=3;37;IF([.C61]=4;75;IF([.C61]=5;150;IF([.C61]=6;375;IF([.C61]=7;750;0))))))" office:value-type="float" office:value="0" calcext:value-type="float">
            <text:p>0</text:p>
          </table:table-cell>
          <table:table-cell table:number-columns-repeated="2"/>
          <table:table-cell table:formula="of:=[.P61]*28+[.Q61]*22+[.R61]*100+[.S61]*18+[.T61]*35+[.U61]*22+[.V61]*100+[.W61]*18+[.X61]*80+[.Y61]*1100+[.Z61]*200+[.AA61]*100+[.AB61]*32+[.AC61]*1700+[.AD61]*850+[.AE61]*200+[.AF61]*400+[.AG61]*70+[.AH61]*300+[.AI61]*450+[.AJ61]*1100+[.AK61]*500+[.AL61]*60+[.AM61]*600+[.AN61]*20+[.AO61]*60+[.AP61]*20+[.AQ61]*100+[.AR61]*900+[.AS61]*1300+[.AT61]*2500+[.AU61]*900+[.AV61]*1200+[.AW61]*1500+[.AX61]*110+[.AY61]*130+[.AZ61]*50+[.BA61]*600+[.BB61]*5500+[.BC61]*70000+[.BD61]*90000" office:value-type="float" office:value="0" calcext:value-type="float">
            <text:p>0</text:p>
          </table:table-cell>
          <table:table-cell table:style-name="ce2" table:formula="of:=[.G61]-[.F61]" office:value-type="float" office:value="0" calcext:value-type="float">
            <text:p>0</text:p>
          </table:table-cell>
          <table:table-cell table:style-name="ce3" table:formula="of:=IF([.F61]=0;&quot;&quot;;[.G61]/[.F61])">
            <text:p/>
          </table:table-cell>
          <table:table-cell table:formula="of:=IF([.G61]=0;&quot;&quot;;[.E61]*[.F61]/[.G61])">
            <text:p/>
          </table:table-cell>
          <table:table-cell table:style-name="ce5"/>
          <table:table-cell table:formula="of:=[.D61]*[.K61]" office:value-type="float" office:value="0" calcext:value-type="float">
            <text:p>0</text:p>
          </table:table-cell>
          <table:table-cell table:formula="of:=[.F61]*[.K61]" office:value-type="float" office:value="0" calcext:value-type="float">
            <text:p>0</text:p>
          </table:table-cell>
          <table:table-cell table:style-name="ce6" table:formula="of:=[.H61]*[.K61]" office:value-type="float" office:value="0" calcext:value-type="float">
            <text:p>0</text:p>
          </table:table-cell>
          <table:table-cell table:formula="of:=[.G61]*[.K61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2]=2;15;IF([.C62]=3;37;IF([.C62]=4;75;IF([.C62]=5;150;IF([.C62]=6;375;IF([.C62]=7;750;0))))))" office:value-type="float" office:value="0" calcext:value-type="float">
            <text:p>0</text:p>
          </table:table-cell>
          <table:table-cell table:number-columns-repeated="2"/>
          <table:table-cell table:formula="of:=[.P62]*28+[.Q62]*22+[.R62]*100+[.S62]*18+[.T62]*35+[.U62]*22+[.V62]*100+[.W62]*18+[.X62]*80+[.Y62]*1100+[.Z62]*200+[.AA62]*100+[.AB62]*32+[.AC62]*1700+[.AD62]*850+[.AE62]*200+[.AF62]*400+[.AG62]*70+[.AH62]*300+[.AI62]*450+[.AJ62]*1100+[.AK62]*500+[.AL62]*60+[.AM62]*600+[.AN62]*20+[.AO62]*60+[.AP62]*20+[.AQ62]*100+[.AR62]*900+[.AS62]*1300+[.AT62]*2500+[.AU62]*900+[.AV62]*1200+[.AW62]*1500+[.AX62]*110+[.AY62]*130+[.AZ62]*50+[.BA62]*600+[.BB62]*5500+[.BC62]*70000+[.BD62]*90000" office:value-type="float" office:value="0" calcext:value-type="float">
            <text:p>0</text:p>
          </table:table-cell>
          <table:table-cell table:style-name="ce2" table:formula="of:=[.G62]-[.F62]" office:value-type="float" office:value="0" calcext:value-type="float">
            <text:p>0</text:p>
          </table:table-cell>
          <table:table-cell table:style-name="ce3" table:formula="of:=IF([.F62]=0;&quot;&quot;;[.G62]/[.F62])">
            <text:p/>
          </table:table-cell>
          <table:table-cell table:formula="of:=IF([.G62]=0;&quot;&quot;;[.E62]*[.F62]/[.G62])">
            <text:p/>
          </table:table-cell>
          <table:table-cell table:style-name="ce5"/>
          <table:table-cell table:formula="of:=[.D62]*[.K62]" office:value-type="float" office:value="0" calcext:value-type="float">
            <text:p>0</text:p>
          </table:table-cell>
          <table:table-cell table:formula="of:=[.F62]*[.K62]" office:value-type="float" office:value="0" calcext:value-type="float">
            <text:p>0</text:p>
          </table:table-cell>
          <table:table-cell table:style-name="ce6" table:formula="of:=[.H62]*[.K62]" office:value-type="float" office:value="0" calcext:value-type="float">
            <text:p>0</text:p>
          </table:table-cell>
          <table:table-cell table:formula="of:=[.G62]*[.K62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3]=2;15;IF([.C63]=3;37;IF([.C63]=4;75;IF([.C63]=5;150;IF([.C63]=6;375;IF([.C63]=7;750;0))))))" office:value-type="float" office:value="0" calcext:value-type="float">
            <text:p>0</text:p>
          </table:table-cell>
          <table:table-cell table:number-columns-repeated="2"/>
          <table:table-cell table:formula="of:=[.P63]*28+[.Q63]*22+[.R63]*100+[.S63]*18+[.T63]*35+[.U63]*22+[.V63]*100+[.W63]*18+[.X63]*80+[.Y63]*1100+[.Z63]*200+[.AA63]*100+[.AB63]*32+[.AC63]*1700+[.AD63]*850+[.AE63]*200+[.AF63]*400+[.AG63]*70+[.AH63]*300+[.AI63]*450+[.AJ63]*1100+[.AK63]*500+[.AL63]*60+[.AM63]*600+[.AN63]*20+[.AO63]*60+[.AP63]*20+[.AQ63]*100+[.AR63]*900+[.AS63]*1300+[.AT63]*2500+[.AU63]*900+[.AV63]*1200+[.AW63]*1500+[.AX63]*110+[.AY63]*130+[.AZ63]*50+[.BA63]*600+[.BB63]*5500+[.BC63]*70000+[.BD63]*90000" office:value-type="float" office:value="0" calcext:value-type="float">
            <text:p>0</text:p>
          </table:table-cell>
          <table:table-cell table:style-name="ce2" table:formula="of:=[.G63]-[.F63]" office:value-type="float" office:value="0" calcext:value-type="float">
            <text:p>0</text:p>
          </table:table-cell>
          <table:table-cell table:style-name="ce3" table:formula="of:=IF([.F63]=0;&quot;&quot;;[.G63]/[.F63])">
            <text:p/>
          </table:table-cell>
          <table:table-cell table:formula="of:=IF([.G63]=0;&quot;&quot;;[.E63]*[.F63]/[.G63])">
            <text:p/>
          </table:table-cell>
          <table:table-cell table:style-name="ce5"/>
          <table:table-cell table:formula="of:=[.D63]*[.K63]" office:value-type="float" office:value="0" calcext:value-type="float">
            <text:p>0</text:p>
          </table:table-cell>
          <table:table-cell table:formula="of:=[.F63]*[.K63]" office:value-type="float" office:value="0" calcext:value-type="float">
            <text:p>0</text:p>
          </table:table-cell>
          <table:table-cell table:style-name="ce6" table:formula="of:=[.H63]*[.K63]" office:value-type="float" office:value="0" calcext:value-type="float">
            <text:p>0</text:p>
          </table:table-cell>
          <table:table-cell table:formula="of:=[.G63]*[.K63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4]=2;15;IF([.C64]=3;37;IF([.C64]=4;75;IF([.C64]=5;150;IF([.C64]=6;375;IF([.C64]=7;750;0))))))" office:value-type="float" office:value="0" calcext:value-type="float">
            <text:p>0</text:p>
          </table:table-cell>
          <table:table-cell table:number-columns-repeated="2"/>
          <table:table-cell table:formula="of:=[.P64]*28+[.Q64]*22+[.R64]*100+[.S64]*18+[.T64]*35+[.U64]*22+[.V64]*100+[.W64]*18+[.X64]*80+[.Y64]*1100+[.Z64]*200+[.AA64]*100+[.AB64]*32+[.AC64]*1700+[.AD64]*850+[.AE64]*200+[.AF64]*400+[.AG64]*70+[.AH64]*300+[.AI64]*450+[.AJ64]*1100+[.AK64]*500+[.AL64]*60+[.AM64]*600+[.AN64]*20+[.AO64]*60+[.AP64]*20+[.AQ64]*100+[.AR64]*900+[.AS64]*1300+[.AT64]*2500+[.AU64]*900+[.AV64]*1200+[.AW64]*1500+[.AX64]*110+[.AY64]*130+[.AZ64]*50+[.BA64]*600+[.BB64]*5500+[.BC64]*70000+[.BD64]*90000" office:value-type="float" office:value="0" calcext:value-type="float">
            <text:p>0</text:p>
          </table:table-cell>
          <table:table-cell table:style-name="ce2" table:formula="of:=[.G64]-[.F64]" office:value-type="float" office:value="0" calcext:value-type="float">
            <text:p>0</text:p>
          </table:table-cell>
          <table:table-cell table:style-name="ce3" table:formula="of:=IF([.F64]=0;&quot;&quot;;[.G64]/[.F64])">
            <text:p/>
          </table:table-cell>
          <table:table-cell table:formula="of:=IF([.G64]=0;&quot;&quot;;[.E64]*[.F64]/[.G64])">
            <text:p/>
          </table:table-cell>
          <table:table-cell table:style-name="ce5"/>
          <table:table-cell table:formula="of:=[.D64]*[.K64]" office:value-type="float" office:value="0" calcext:value-type="float">
            <text:p>0</text:p>
          </table:table-cell>
          <table:table-cell table:formula="of:=[.F64]*[.K64]" office:value-type="float" office:value="0" calcext:value-type="float">
            <text:p>0</text:p>
          </table:table-cell>
          <table:table-cell table:style-name="ce6" table:formula="of:=[.H64]*[.K64]" office:value-type="float" office:value="0" calcext:value-type="float">
            <text:p>0</text:p>
          </table:table-cell>
          <table:table-cell table:formula="of:=[.G64]*[.K64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5]=2;15;IF([.C65]=3;37;IF([.C65]=4;75;IF([.C65]=5;150;IF([.C65]=6;375;IF([.C65]=7;750;0))))))" office:value-type="float" office:value="0" calcext:value-type="float">
            <text:p>0</text:p>
          </table:table-cell>
          <table:table-cell table:number-columns-repeated="2"/>
          <table:table-cell table:formula="of:=[.P65]*28+[.Q65]*22+[.R65]*100+[.S65]*18+[.T65]*35+[.U65]*22+[.V65]*100+[.W65]*18+[.X65]*80+[.Y65]*1100+[.Z65]*200+[.AA65]*100+[.AB65]*32+[.AC65]*1700+[.AD65]*850+[.AE65]*200+[.AF65]*400+[.AG65]*70+[.AH65]*300+[.AI65]*450+[.AJ65]*1100+[.AK65]*500+[.AL65]*60+[.AM65]*600+[.AN65]*20+[.AO65]*60+[.AP65]*20+[.AQ65]*100+[.AR65]*900+[.AS65]*1300+[.AT65]*2500+[.AU65]*900+[.AV65]*1200+[.AW65]*1500+[.AX65]*110+[.AY65]*130+[.AZ65]*50+[.BA65]*600+[.BB65]*5500+[.BC65]*70000+[.BD65]*90000" office:value-type="float" office:value="0" calcext:value-type="float">
            <text:p>0</text:p>
          </table:table-cell>
          <table:table-cell table:style-name="ce2" table:formula="of:=[.G65]-[.F65]" office:value-type="float" office:value="0" calcext:value-type="float">
            <text:p>0</text:p>
          </table:table-cell>
          <table:table-cell table:style-name="ce3" table:formula="of:=IF([.F65]=0;&quot;&quot;;[.G65]/[.F65])">
            <text:p/>
          </table:table-cell>
          <table:table-cell table:formula="of:=IF([.G65]=0;&quot;&quot;;[.E65]*[.F65]/[.G65])">
            <text:p/>
          </table:table-cell>
          <table:table-cell table:style-name="ce5"/>
          <table:table-cell table:formula="of:=[.D65]*[.K65]" office:value-type="float" office:value="0" calcext:value-type="float">
            <text:p>0</text:p>
          </table:table-cell>
          <table:table-cell table:formula="of:=[.F65]*[.K65]" office:value-type="float" office:value="0" calcext:value-type="float">
            <text:p>0</text:p>
          </table:table-cell>
          <table:table-cell table:style-name="ce6" table:formula="of:=[.H65]*[.K65]" office:value-type="float" office:value="0" calcext:value-type="float">
            <text:p>0</text:p>
          </table:table-cell>
          <table:table-cell table:formula="of:=[.G65]*[.K65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6]=2;15;IF([.C66]=3;37;IF([.C66]=4;75;IF([.C66]=5;150;IF([.C66]=6;375;IF([.C66]=7;750;0))))))" office:value-type="float" office:value="0" calcext:value-type="float">
            <text:p>0</text:p>
          </table:table-cell>
          <table:table-cell table:number-columns-repeated="2"/>
          <table:table-cell table:formula="of:=[.P66]*28+[.Q66]*22+[.R66]*100+[.S66]*18+[.T66]*35+[.U66]*22+[.V66]*100+[.W66]*18+[.X66]*80+[.Y66]*1100+[.Z66]*200+[.AA66]*100+[.AB66]*32+[.AC66]*1700+[.AD66]*850+[.AE66]*200+[.AF66]*400+[.AG66]*70+[.AH66]*300+[.AI66]*450+[.AJ66]*1100+[.AK66]*500+[.AL66]*60+[.AM66]*600+[.AN66]*20+[.AO66]*60+[.AP66]*20+[.AQ66]*100+[.AR66]*900+[.AS66]*1300+[.AT66]*2500+[.AU66]*900+[.AV66]*1200+[.AW66]*1500+[.AX66]*110+[.AY66]*130+[.AZ66]*50+[.BA66]*600+[.BB66]*5500+[.BC66]*70000+[.BD66]*90000" office:value-type="float" office:value="0" calcext:value-type="float">
            <text:p>0</text:p>
          </table:table-cell>
          <table:table-cell table:style-name="ce2" table:formula="of:=[.G66]-[.F66]" office:value-type="float" office:value="0" calcext:value-type="float">
            <text:p>0</text:p>
          </table:table-cell>
          <table:table-cell table:style-name="ce3" table:formula="of:=IF([.F66]=0;&quot;&quot;;[.G66]/[.F66])">
            <text:p/>
          </table:table-cell>
          <table:table-cell table:formula="of:=IF([.G66]=0;&quot;&quot;;[.E66]*[.F66]/[.G66])">
            <text:p/>
          </table:table-cell>
          <table:table-cell table:style-name="ce5"/>
          <table:table-cell table:formula="of:=[.D66]*[.K66]" office:value-type="float" office:value="0" calcext:value-type="float">
            <text:p>0</text:p>
          </table:table-cell>
          <table:table-cell table:formula="of:=[.F66]*[.K66]" office:value-type="float" office:value="0" calcext:value-type="float">
            <text:p>0</text:p>
          </table:table-cell>
          <table:table-cell table:style-name="ce6" table:formula="of:=[.H66]*[.K66]" office:value-type="float" office:value="0" calcext:value-type="float">
            <text:p>0</text:p>
          </table:table-cell>
          <table:table-cell table:formula="of:=[.G66]*[.K66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7]=2;15;IF([.C67]=3;37;IF([.C67]=4;75;IF([.C67]=5;150;IF([.C67]=6;375;IF([.C67]=7;750;0))))))" office:value-type="float" office:value="0" calcext:value-type="float">
            <text:p>0</text:p>
          </table:table-cell>
          <table:table-cell table:number-columns-repeated="2"/>
          <table:table-cell table:formula="of:=[.P67]*28+[.Q67]*22+[.R67]*100+[.S67]*18+[.T67]*35+[.U67]*22+[.V67]*100+[.W67]*18+[.X67]*80+[.Y67]*1100+[.Z67]*200+[.AA67]*100+[.AB67]*32+[.AC67]*1700+[.AD67]*850+[.AE67]*200+[.AF67]*400+[.AG67]*70+[.AH67]*300+[.AI67]*450+[.AJ67]*1100+[.AK67]*500+[.AL67]*60+[.AM67]*600+[.AN67]*20+[.AO67]*60+[.AP67]*20+[.AQ67]*100+[.AR67]*900+[.AS67]*1300+[.AT67]*2500+[.AU67]*900+[.AV67]*1200+[.AW67]*1500+[.AX67]*110+[.AY67]*130+[.AZ67]*50+[.BA67]*600+[.BB67]*5500+[.BC67]*70000+[.BD67]*90000" office:value-type="float" office:value="0" calcext:value-type="float">
            <text:p>0</text:p>
          </table:table-cell>
          <table:table-cell table:style-name="ce2" table:formula="of:=[.G67]-[.F67]" office:value-type="float" office:value="0" calcext:value-type="float">
            <text:p>0</text:p>
          </table:table-cell>
          <table:table-cell table:style-name="ce3" table:formula="of:=IF([.F67]=0;&quot;&quot;;[.G67]/[.F67])">
            <text:p/>
          </table:table-cell>
          <table:table-cell table:formula="of:=IF([.G67]=0;&quot;&quot;;[.E67]*[.F67]/[.G67])">
            <text:p/>
          </table:table-cell>
          <table:table-cell table:style-name="ce5"/>
          <table:table-cell table:formula="of:=[.D67]*[.K67]" office:value-type="float" office:value="0" calcext:value-type="float">
            <text:p>0</text:p>
          </table:table-cell>
          <table:table-cell table:formula="of:=[.F67]*[.K67]" office:value-type="float" office:value="0" calcext:value-type="float">
            <text:p>0</text:p>
          </table:table-cell>
          <table:table-cell table:style-name="ce6" table:formula="of:=[.H67]*[.K67]" office:value-type="float" office:value="0" calcext:value-type="float">
            <text:p>0</text:p>
          </table:table-cell>
          <table:table-cell table:formula="of:=[.G67]*[.K67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8]=2;15;IF([.C68]=3;37;IF([.C68]=4;75;IF([.C68]=5;150;IF([.C68]=6;375;IF([.C68]=7;750;0))))))" office:value-type="float" office:value="0" calcext:value-type="float">
            <text:p>0</text:p>
          </table:table-cell>
          <table:table-cell table:number-columns-repeated="2"/>
          <table:table-cell table:formula="of:=[.P68]*28+[.Q68]*22+[.R68]*100+[.S68]*18+[.T68]*35+[.U68]*22+[.V68]*100+[.W68]*18+[.X68]*80+[.Y68]*1100+[.Z68]*200+[.AA68]*100+[.AB68]*32+[.AC68]*1700+[.AD68]*850+[.AE68]*200+[.AF68]*400+[.AG68]*70+[.AH68]*300+[.AI68]*450+[.AJ68]*1100+[.AK68]*500+[.AL68]*60+[.AM68]*600+[.AN68]*20+[.AO68]*60+[.AP68]*20+[.AQ68]*100+[.AR68]*900+[.AS68]*1300+[.AT68]*2500+[.AU68]*900+[.AV68]*1200+[.AW68]*1500+[.AX68]*110+[.AY68]*130+[.AZ68]*50+[.BA68]*600+[.BB68]*5500+[.BC68]*70000+[.BD68]*90000" office:value-type="float" office:value="0" calcext:value-type="float">
            <text:p>0</text:p>
          </table:table-cell>
          <table:table-cell table:style-name="ce2" table:formula="of:=[.G68]-[.F68]" office:value-type="float" office:value="0" calcext:value-type="float">
            <text:p>0</text:p>
          </table:table-cell>
          <table:table-cell table:style-name="ce3" table:formula="of:=IF([.F68]=0;&quot;&quot;;[.G68]/[.F68])">
            <text:p/>
          </table:table-cell>
          <table:table-cell table:formula="of:=IF([.G68]=0;&quot;&quot;;[.E68]*[.F68]/[.G68])">
            <text:p/>
          </table:table-cell>
          <table:table-cell table:style-name="ce5"/>
          <table:table-cell table:formula="of:=[.D68]*[.K68]" office:value-type="float" office:value="0" calcext:value-type="float">
            <text:p>0</text:p>
          </table:table-cell>
          <table:table-cell table:formula="of:=[.F68]*[.K68]" office:value-type="float" office:value="0" calcext:value-type="float">
            <text:p>0</text:p>
          </table:table-cell>
          <table:table-cell table:style-name="ce6" table:formula="of:=[.H68]*[.K68]" office:value-type="float" office:value="0" calcext:value-type="float">
            <text:p>0</text:p>
          </table:table-cell>
          <table:table-cell table:formula="of:=[.G68]*[.K68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69]=2;15;IF([.C69]=3;37;IF([.C69]=4;75;IF([.C69]=5;150;IF([.C69]=6;375;IF([.C69]=7;750;0))))))" office:value-type="float" office:value="0" calcext:value-type="float">
            <text:p>0</text:p>
          </table:table-cell>
          <table:table-cell table:number-columns-repeated="2"/>
          <table:table-cell table:formula="of:=[.P69]*28+[.Q69]*22+[.R69]*100+[.S69]*18+[.T69]*35+[.U69]*22+[.V69]*100+[.W69]*18+[.X69]*80+[.Y69]*1100+[.Z69]*200+[.AA69]*100+[.AB69]*32+[.AC69]*1700+[.AD69]*850+[.AE69]*200+[.AF69]*400+[.AG69]*70+[.AH69]*300+[.AI69]*450+[.AJ69]*1100+[.AK69]*500+[.AL69]*60+[.AM69]*600+[.AN69]*20+[.AO69]*60+[.AP69]*20+[.AQ69]*100+[.AR69]*900+[.AS69]*1300+[.AT69]*2500+[.AU69]*900+[.AV69]*1200+[.AW69]*1500+[.AX69]*110+[.AY69]*130+[.AZ69]*50+[.BA69]*600+[.BB69]*5500+[.BC69]*70000+[.BD69]*90000" office:value-type="float" office:value="0" calcext:value-type="float">
            <text:p>0</text:p>
          </table:table-cell>
          <table:table-cell table:style-name="ce2" table:formula="of:=[.G69]-[.F69]" office:value-type="float" office:value="0" calcext:value-type="float">
            <text:p>0</text:p>
          </table:table-cell>
          <table:table-cell table:style-name="ce3" table:formula="of:=IF([.F69]=0;&quot;&quot;;[.G69]/[.F69])">
            <text:p/>
          </table:table-cell>
          <table:table-cell table:formula="of:=IF([.G69]=0;&quot;&quot;;[.E69]*[.F69]/[.G69])">
            <text:p/>
          </table:table-cell>
          <table:table-cell table:style-name="ce5"/>
          <table:table-cell table:formula="of:=[.D69]*[.K69]" office:value-type="float" office:value="0" calcext:value-type="float">
            <text:p>0</text:p>
          </table:table-cell>
          <table:table-cell table:formula="of:=[.F69]*[.K69]" office:value-type="float" office:value="0" calcext:value-type="float">
            <text:p>0</text:p>
          </table:table-cell>
          <table:table-cell table:style-name="ce6" table:formula="of:=[.H69]*[.K69]" office:value-type="float" office:value="0" calcext:value-type="float">
            <text:p>0</text:p>
          </table:table-cell>
          <table:table-cell table:formula="of:=[.G69]*[.K69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0]=2;15;IF([.C70]=3;37;IF([.C70]=4;75;IF([.C70]=5;150;IF([.C70]=6;375;IF([.C70]=7;750;0))))))" office:value-type="float" office:value="0" calcext:value-type="float">
            <text:p>0</text:p>
          </table:table-cell>
          <table:table-cell table:number-columns-repeated="2"/>
          <table:table-cell table:formula="of:=[.P70]*28+[.Q70]*22+[.R70]*100+[.S70]*18+[.T70]*35+[.U70]*22+[.V70]*100+[.W70]*18+[.X70]*80+[.Y70]*1100+[.Z70]*200+[.AA70]*100+[.AB70]*32+[.AC70]*1700+[.AD70]*850+[.AE70]*200+[.AF70]*400+[.AG70]*70+[.AH70]*300+[.AI70]*450+[.AJ70]*1100+[.AK70]*500+[.AL70]*60+[.AM70]*600+[.AN70]*20+[.AO70]*60+[.AP70]*20+[.AQ70]*100+[.AR70]*900+[.AS70]*1300+[.AT70]*2500+[.AU70]*900+[.AV70]*1200+[.AW70]*1500+[.AX70]*110+[.AY70]*130+[.AZ70]*50+[.BA70]*600+[.BB70]*5500+[.BC70]*70000+[.BD70]*90000" office:value-type="float" office:value="0" calcext:value-type="float">
            <text:p>0</text:p>
          </table:table-cell>
          <table:table-cell table:style-name="ce2" table:formula="of:=[.G70]-[.F70]" office:value-type="float" office:value="0" calcext:value-type="float">
            <text:p>0</text:p>
          </table:table-cell>
          <table:table-cell table:style-name="ce3" table:formula="of:=IF([.F70]=0;&quot;&quot;;[.G70]/[.F70])">
            <text:p/>
          </table:table-cell>
          <table:table-cell table:formula="of:=IF([.G70]=0;&quot;&quot;;[.E70]*[.F70]/[.G70])">
            <text:p/>
          </table:table-cell>
          <table:table-cell table:style-name="ce5"/>
          <table:table-cell table:formula="of:=[.D70]*[.K70]" office:value-type="float" office:value="0" calcext:value-type="float">
            <text:p>0</text:p>
          </table:table-cell>
          <table:table-cell table:formula="of:=[.F70]*[.K70]" office:value-type="float" office:value="0" calcext:value-type="float">
            <text:p>0</text:p>
          </table:table-cell>
          <table:table-cell table:style-name="ce6" table:formula="of:=[.H70]*[.K70]" office:value-type="float" office:value="0" calcext:value-type="float">
            <text:p>0</text:p>
          </table:table-cell>
          <table:table-cell table:formula="of:=[.G70]*[.K70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1]=2;15;IF([.C71]=3;37;IF([.C71]=4;75;IF([.C71]=5;150;IF([.C71]=6;375;IF([.C71]=7;750;0))))))" office:value-type="float" office:value="0" calcext:value-type="float">
            <text:p>0</text:p>
          </table:table-cell>
          <table:table-cell table:number-columns-repeated="2"/>
          <table:table-cell table:formula="of:=[.P71]*28+[.Q71]*22+[.R71]*100+[.S71]*18+[.T71]*35+[.U71]*22+[.V71]*100+[.W71]*18+[.X71]*80+[.Y71]*1100+[.Z71]*200+[.AA71]*100+[.AB71]*32+[.AC71]*1700+[.AD71]*850+[.AE71]*200+[.AF71]*400+[.AG71]*70+[.AH71]*300+[.AI71]*450+[.AJ71]*1100+[.AK71]*500+[.AL71]*60+[.AM71]*600+[.AN71]*20+[.AO71]*60+[.AP71]*20+[.AQ71]*100+[.AR71]*900+[.AS71]*1300+[.AT71]*2500+[.AU71]*900+[.AV71]*1200+[.AW71]*1500+[.AX71]*110+[.AY71]*130+[.AZ71]*50+[.BA71]*600+[.BB71]*5500+[.BC71]*70000+[.BD71]*90000" office:value-type="float" office:value="0" calcext:value-type="float">
            <text:p>0</text:p>
          </table:table-cell>
          <table:table-cell table:style-name="ce2" table:formula="of:=[.G71]-[.F71]" office:value-type="float" office:value="0" calcext:value-type="float">
            <text:p>0</text:p>
          </table:table-cell>
          <table:table-cell table:style-name="ce3" table:formula="of:=IF([.F71]=0;&quot;&quot;;[.G71]/[.F71])">
            <text:p/>
          </table:table-cell>
          <table:table-cell table:formula="of:=IF([.G71]=0;&quot;&quot;;[.E71]*[.F71]/[.G71])">
            <text:p/>
          </table:table-cell>
          <table:table-cell table:style-name="ce5"/>
          <table:table-cell table:formula="of:=[.D71]*[.K71]" office:value-type="float" office:value="0" calcext:value-type="float">
            <text:p>0</text:p>
          </table:table-cell>
          <table:table-cell table:formula="of:=[.F71]*[.K71]" office:value-type="float" office:value="0" calcext:value-type="float">
            <text:p>0</text:p>
          </table:table-cell>
          <table:table-cell table:style-name="ce6" table:formula="of:=[.H71]*[.K71]" office:value-type="float" office:value="0" calcext:value-type="float">
            <text:p>0</text:p>
          </table:table-cell>
          <table:table-cell table:formula="of:=[.G71]*[.K71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2]=2;15;IF([.C72]=3;37;IF([.C72]=4;75;IF([.C72]=5;150;IF([.C72]=6;375;IF([.C72]=7;750;0))))))" office:value-type="float" office:value="0" calcext:value-type="float">
            <text:p>0</text:p>
          </table:table-cell>
          <table:table-cell table:number-columns-repeated="2"/>
          <table:table-cell table:formula="of:=[.P72]*28+[.Q72]*22+[.R72]*100+[.S72]*18+[.T72]*35+[.U72]*22+[.V72]*100+[.W72]*18+[.X72]*80+[.Y72]*1100+[.Z72]*200+[.AA72]*100+[.AB72]*32+[.AC72]*1700+[.AD72]*850+[.AE72]*200+[.AF72]*400+[.AG72]*70+[.AH72]*300+[.AI72]*450+[.AJ72]*1100+[.AK72]*500+[.AL72]*60+[.AM72]*600+[.AN72]*20+[.AO72]*60+[.AP72]*20+[.AQ72]*100+[.AR72]*900+[.AS72]*1300+[.AT72]*2500+[.AU72]*900+[.AV72]*1200+[.AW72]*1500+[.AX72]*110+[.AY72]*130+[.AZ72]*50+[.BA72]*600+[.BB72]*5500+[.BC72]*70000+[.BD72]*90000" office:value-type="float" office:value="0" calcext:value-type="float">
            <text:p>0</text:p>
          </table:table-cell>
          <table:table-cell table:style-name="ce2" table:formula="of:=[.G72]-[.F72]" office:value-type="float" office:value="0" calcext:value-type="float">
            <text:p>0</text:p>
          </table:table-cell>
          <table:table-cell table:style-name="ce3" table:formula="of:=IF([.F72]=0;&quot;&quot;;[.G72]/[.F72])">
            <text:p/>
          </table:table-cell>
          <table:table-cell table:formula="of:=IF([.G72]=0;&quot;&quot;;[.E72]*[.F72]/[.G72])">
            <text:p/>
          </table:table-cell>
          <table:table-cell table:style-name="ce5"/>
          <table:table-cell table:formula="of:=[.D72]*[.K72]" office:value-type="float" office:value="0" calcext:value-type="float">
            <text:p>0</text:p>
          </table:table-cell>
          <table:table-cell table:formula="of:=[.F72]*[.K72]" office:value-type="float" office:value="0" calcext:value-type="float">
            <text:p>0</text:p>
          </table:table-cell>
          <table:table-cell table:style-name="ce6" table:formula="of:=[.H72]*[.K72]" office:value-type="float" office:value="0" calcext:value-type="float">
            <text:p>0</text:p>
          </table:table-cell>
          <table:table-cell table:formula="of:=[.G72]*[.K72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3]=2;15;IF([.C73]=3;37;IF([.C73]=4;75;IF([.C73]=5;150;IF([.C73]=6;375;IF([.C73]=7;750;0))))))" office:value-type="float" office:value="0" calcext:value-type="float">
            <text:p>0</text:p>
          </table:table-cell>
          <table:table-cell table:number-columns-repeated="2"/>
          <table:table-cell table:formula="of:=[.P73]*28+[.Q73]*22+[.R73]*100+[.S73]*18+[.T73]*35+[.U73]*22+[.V73]*100+[.W73]*18+[.X73]*80+[.Y73]*1100+[.Z73]*200+[.AA73]*100+[.AB73]*32+[.AC73]*1700+[.AD73]*850+[.AE73]*200+[.AF73]*400+[.AG73]*70+[.AH73]*300+[.AI73]*450+[.AJ73]*1100+[.AK73]*500+[.AL73]*60+[.AM73]*600+[.AN73]*20+[.AO73]*60+[.AP73]*20+[.AQ73]*100+[.AR73]*900+[.AS73]*1300+[.AT73]*2500+[.AU73]*900+[.AV73]*1200+[.AW73]*1500+[.AX73]*110+[.AY73]*130+[.AZ73]*50+[.BA73]*600+[.BB73]*5500+[.BC73]*70000+[.BD73]*90000" office:value-type="float" office:value="0" calcext:value-type="float">
            <text:p>0</text:p>
          </table:table-cell>
          <table:table-cell table:style-name="ce2" table:formula="of:=[.G73]-[.F73]" office:value-type="float" office:value="0" calcext:value-type="float">
            <text:p>0</text:p>
          </table:table-cell>
          <table:table-cell table:style-name="ce3" table:formula="of:=IF([.F73]=0;&quot;&quot;;[.G73]/[.F73])">
            <text:p/>
          </table:table-cell>
          <table:table-cell table:formula="of:=IF([.G73]=0;&quot;&quot;;[.E73]*[.F73]/[.G73])">
            <text:p/>
          </table:table-cell>
          <table:table-cell table:style-name="ce5"/>
          <table:table-cell table:formula="of:=[.D73]*[.K73]" office:value-type="float" office:value="0" calcext:value-type="float">
            <text:p>0</text:p>
          </table:table-cell>
          <table:table-cell table:formula="of:=[.F73]*[.K73]" office:value-type="float" office:value="0" calcext:value-type="float">
            <text:p>0</text:p>
          </table:table-cell>
          <table:table-cell table:style-name="ce6" table:formula="of:=[.H73]*[.K73]" office:value-type="float" office:value="0" calcext:value-type="float">
            <text:p>0</text:p>
          </table:table-cell>
          <table:table-cell table:formula="of:=[.G73]*[.K73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4]=2;15;IF([.C74]=3;37;IF([.C74]=4;75;IF([.C74]=5;150;IF([.C74]=6;375;IF([.C74]=7;750;0))))))" office:value-type="float" office:value="0" calcext:value-type="float">
            <text:p>0</text:p>
          </table:table-cell>
          <table:table-cell table:number-columns-repeated="2"/>
          <table:table-cell table:formula="of:=[.P74]*28+[.Q74]*22+[.R74]*100+[.S74]*18+[.T74]*35+[.U74]*22+[.V74]*100+[.W74]*18+[.X74]*80+[.Y74]*1100+[.Z74]*200+[.AA74]*100+[.AB74]*32+[.AC74]*1700+[.AD74]*850+[.AE74]*200+[.AF74]*400+[.AG74]*70+[.AH74]*300+[.AI74]*450+[.AJ74]*1100+[.AK74]*500+[.AL74]*60+[.AM74]*600+[.AN74]*20+[.AO74]*60+[.AP74]*20+[.AQ74]*100+[.AR74]*900+[.AS74]*1300+[.AT74]*2500+[.AU74]*900+[.AV74]*1200+[.AW74]*1500+[.AX74]*110+[.AY74]*130+[.AZ74]*50+[.BA74]*600+[.BB74]*5500+[.BC74]*70000+[.BD74]*90000" office:value-type="float" office:value="0" calcext:value-type="float">
            <text:p>0</text:p>
          </table:table-cell>
          <table:table-cell table:style-name="ce2" table:formula="of:=[.G74]-[.F74]" office:value-type="float" office:value="0" calcext:value-type="float">
            <text:p>0</text:p>
          </table:table-cell>
          <table:table-cell table:style-name="ce3" table:formula="of:=IF([.F74]=0;&quot;&quot;;[.G74]/[.F74])">
            <text:p/>
          </table:table-cell>
          <table:table-cell table:formula="of:=IF([.G74]=0;&quot;&quot;;[.E74]*[.F74]/[.G74])">
            <text:p/>
          </table:table-cell>
          <table:table-cell table:style-name="ce5"/>
          <table:table-cell table:formula="of:=[.D74]*[.K74]" office:value-type="float" office:value="0" calcext:value-type="float">
            <text:p>0</text:p>
          </table:table-cell>
          <table:table-cell table:formula="of:=[.F74]*[.K74]" office:value-type="float" office:value="0" calcext:value-type="float">
            <text:p>0</text:p>
          </table:table-cell>
          <table:table-cell table:style-name="ce6" table:formula="of:=[.H74]*[.K74]" office:value-type="float" office:value="0" calcext:value-type="float">
            <text:p>0</text:p>
          </table:table-cell>
          <table:table-cell table:formula="of:=[.G74]*[.K74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5]=2;15;IF([.C75]=3;37;IF([.C75]=4;75;IF([.C75]=5;150;IF([.C75]=6;375;IF([.C75]=7;750;0))))))" office:value-type="float" office:value="0" calcext:value-type="float">
            <text:p>0</text:p>
          </table:table-cell>
          <table:table-cell table:number-columns-repeated="2"/>
          <table:table-cell table:formula="of:=[.P75]*28+[.Q75]*22+[.R75]*100+[.S75]*18+[.T75]*35+[.U75]*22+[.V75]*100+[.W75]*18+[.X75]*80+[.Y75]*1100+[.Z75]*200+[.AA75]*100+[.AB75]*32+[.AC75]*1700+[.AD75]*850+[.AE75]*200+[.AF75]*400+[.AG75]*70+[.AH75]*300+[.AI75]*450+[.AJ75]*1100+[.AK75]*500+[.AL75]*60+[.AM75]*600+[.AN75]*20+[.AO75]*60+[.AP75]*20+[.AQ75]*100+[.AR75]*900+[.AS75]*1300+[.AT75]*2500+[.AU75]*900+[.AV75]*1200+[.AW75]*1500+[.AX75]*110+[.AY75]*130+[.AZ75]*50+[.BA75]*600+[.BB75]*5500+[.BC75]*70000+[.BD75]*90000" office:value-type="float" office:value="0" calcext:value-type="float">
            <text:p>0</text:p>
          </table:table-cell>
          <table:table-cell table:style-name="ce2" table:formula="of:=[.G75]-[.F75]" office:value-type="float" office:value="0" calcext:value-type="float">
            <text:p>0</text:p>
          </table:table-cell>
          <table:table-cell table:style-name="ce3" table:formula="of:=IF([.F75]=0;&quot;&quot;;[.G75]/[.F75])">
            <text:p/>
          </table:table-cell>
          <table:table-cell table:formula="of:=IF([.G75]=0;&quot;&quot;;[.E75]*[.F75]/[.G75])">
            <text:p/>
          </table:table-cell>
          <table:table-cell table:style-name="ce5"/>
          <table:table-cell table:formula="of:=[.D75]*[.K75]" office:value-type="float" office:value="0" calcext:value-type="float">
            <text:p>0</text:p>
          </table:table-cell>
          <table:table-cell table:formula="of:=[.F75]*[.K75]" office:value-type="float" office:value="0" calcext:value-type="float">
            <text:p>0</text:p>
          </table:table-cell>
          <table:table-cell table:style-name="ce6" table:formula="of:=[.H75]*[.K75]" office:value-type="float" office:value="0" calcext:value-type="float">
            <text:p>0</text:p>
          </table:table-cell>
          <table:table-cell table:formula="of:=[.G75]*[.K75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6]=2;15;IF([.C76]=3;37;IF([.C76]=4;75;IF([.C76]=5;150;IF([.C76]=6;375;IF([.C76]=7;750;0))))))" office:value-type="float" office:value="0" calcext:value-type="float">
            <text:p>0</text:p>
          </table:table-cell>
          <table:table-cell table:number-columns-repeated="2"/>
          <table:table-cell table:formula="of:=[.P76]*28+[.Q76]*22+[.R76]*100+[.S76]*18+[.T76]*35+[.U76]*22+[.V76]*100+[.W76]*18+[.X76]*80+[.Y76]*1100+[.Z76]*200+[.AA76]*100+[.AB76]*32+[.AC76]*1700+[.AD76]*850+[.AE76]*200+[.AF76]*400+[.AG76]*70+[.AH76]*300+[.AI76]*450+[.AJ76]*1100+[.AK76]*500+[.AL76]*60+[.AM76]*600+[.AN76]*20+[.AO76]*60+[.AP76]*20+[.AQ76]*100+[.AR76]*900+[.AS76]*1300+[.AT76]*2500+[.AU76]*900+[.AV76]*1200+[.AW76]*1500+[.AX76]*110+[.AY76]*130+[.AZ76]*50+[.BA76]*600+[.BB76]*5500+[.BC76]*70000+[.BD76]*90000" office:value-type="float" office:value="0" calcext:value-type="float">
            <text:p>0</text:p>
          </table:table-cell>
          <table:table-cell table:style-name="ce2" table:formula="of:=[.G76]-[.F76]" office:value-type="float" office:value="0" calcext:value-type="float">
            <text:p>0</text:p>
          </table:table-cell>
          <table:table-cell table:style-name="ce3" table:formula="of:=IF([.F76]=0;&quot;&quot;;[.G76]/[.F76])">
            <text:p/>
          </table:table-cell>
          <table:table-cell table:formula="of:=IF([.G76]=0;&quot;&quot;;[.E76]*[.F76]/[.G76])">
            <text:p/>
          </table:table-cell>
          <table:table-cell table:style-name="ce5"/>
          <table:table-cell table:formula="of:=[.D76]*[.K76]" office:value-type="float" office:value="0" calcext:value-type="float">
            <text:p>0</text:p>
          </table:table-cell>
          <table:table-cell table:formula="of:=[.F76]*[.K76]" office:value-type="float" office:value="0" calcext:value-type="float">
            <text:p>0</text:p>
          </table:table-cell>
          <table:table-cell table:style-name="ce6" table:formula="of:=[.H76]*[.K76]" office:value-type="float" office:value="0" calcext:value-type="float">
            <text:p>0</text:p>
          </table:table-cell>
          <table:table-cell table:formula="of:=[.G76]*[.K76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7]=2;15;IF([.C77]=3;37;IF([.C77]=4;75;IF([.C77]=5;150;IF([.C77]=6;375;IF([.C77]=7;750;0))))))" office:value-type="float" office:value="0" calcext:value-type="float">
            <text:p>0</text:p>
          </table:table-cell>
          <table:table-cell table:number-columns-repeated="2"/>
          <table:table-cell table:formula="of:=[.P77]*28+[.Q77]*22+[.R77]*100+[.S77]*18+[.T77]*35+[.U77]*22+[.V77]*100+[.W77]*18+[.X77]*80+[.Y77]*1100+[.Z77]*200+[.AA77]*100+[.AB77]*32+[.AC77]*1700+[.AD77]*850+[.AE77]*200+[.AF77]*400+[.AG77]*70+[.AH77]*300+[.AI77]*450+[.AJ77]*1100+[.AK77]*500+[.AL77]*60+[.AM77]*600+[.AN77]*20+[.AO77]*60+[.AP77]*20+[.AQ77]*100+[.AR77]*900+[.AS77]*1300+[.AT77]*2500+[.AU77]*900+[.AV77]*1200+[.AW77]*1500+[.AX77]*110+[.AY77]*130+[.AZ77]*50+[.BA77]*600+[.BB77]*5500+[.BC77]*70000+[.BD77]*90000" office:value-type="float" office:value="0" calcext:value-type="float">
            <text:p>0</text:p>
          </table:table-cell>
          <table:table-cell table:style-name="ce2" table:formula="of:=[.G77]-[.F77]" office:value-type="float" office:value="0" calcext:value-type="float">
            <text:p>0</text:p>
          </table:table-cell>
          <table:table-cell table:style-name="ce3" table:formula="of:=IF([.F77]=0;&quot;&quot;;[.G77]/[.F77])">
            <text:p/>
          </table:table-cell>
          <table:table-cell table:formula="of:=IF([.G77]=0;&quot;&quot;;[.E77]*[.F77]/[.G77])">
            <text:p/>
          </table:table-cell>
          <table:table-cell table:style-name="ce5"/>
          <table:table-cell table:formula="of:=[.D77]*[.K77]" office:value-type="float" office:value="0" calcext:value-type="float">
            <text:p>0</text:p>
          </table:table-cell>
          <table:table-cell table:formula="of:=[.F77]*[.K77]" office:value-type="float" office:value="0" calcext:value-type="float">
            <text:p>0</text:p>
          </table:table-cell>
          <table:table-cell table:style-name="ce6" table:formula="of:=[.H77]*[.K77]" office:value-type="float" office:value="0" calcext:value-type="float">
            <text:p>0</text:p>
          </table:table-cell>
          <table:table-cell table:formula="of:=[.G77]*[.K77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8]=2;15;IF([.C78]=3;37;IF([.C78]=4;75;IF([.C78]=5;150;IF([.C78]=6;375;IF([.C78]=7;750;0))))))" office:value-type="float" office:value="0" calcext:value-type="float">
            <text:p>0</text:p>
          </table:table-cell>
          <table:table-cell table:number-columns-repeated="2"/>
          <table:table-cell table:formula="of:=[.P78]*28+[.Q78]*22+[.R78]*100+[.S78]*18+[.T78]*35+[.U78]*22+[.V78]*100+[.W78]*18+[.X78]*80+[.Y78]*1100+[.Z78]*200+[.AA78]*100+[.AB78]*32+[.AC78]*1700+[.AD78]*850+[.AE78]*200+[.AF78]*400+[.AG78]*70+[.AH78]*300+[.AI78]*450+[.AJ78]*1100+[.AK78]*500+[.AL78]*60+[.AM78]*600+[.AN78]*20+[.AO78]*60+[.AP78]*20+[.AQ78]*100+[.AR78]*900+[.AS78]*1300+[.AT78]*2500+[.AU78]*900+[.AV78]*1200+[.AW78]*1500+[.AX78]*110+[.AY78]*130+[.AZ78]*50+[.BA78]*600+[.BB78]*5500+[.BC78]*70000+[.BD78]*90000" office:value-type="float" office:value="0" calcext:value-type="float">
            <text:p>0</text:p>
          </table:table-cell>
          <table:table-cell table:style-name="ce2" table:formula="of:=[.G78]-[.F78]" office:value-type="float" office:value="0" calcext:value-type="float">
            <text:p>0</text:p>
          </table:table-cell>
          <table:table-cell table:style-name="ce3" table:formula="of:=IF([.F78]=0;&quot;&quot;;[.G78]/[.F78])">
            <text:p/>
          </table:table-cell>
          <table:table-cell table:formula="of:=IF([.G78]=0;&quot;&quot;;[.E78]*[.F78]/[.G78])">
            <text:p/>
          </table:table-cell>
          <table:table-cell table:style-name="ce5"/>
          <table:table-cell table:formula="of:=[.D78]*[.K78]" office:value-type="float" office:value="0" calcext:value-type="float">
            <text:p>0</text:p>
          </table:table-cell>
          <table:table-cell table:formula="of:=[.F78]*[.K78]" office:value-type="float" office:value="0" calcext:value-type="float">
            <text:p>0</text:p>
          </table:table-cell>
          <table:table-cell table:style-name="ce6" table:formula="of:=[.H78]*[.K78]" office:value-type="float" office:value="0" calcext:value-type="float">
            <text:p>0</text:p>
          </table:table-cell>
          <table:table-cell table:formula="of:=[.G78]*[.K78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79]=2;15;IF([.C79]=3;37;IF([.C79]=4;75;IF([.C79]=5;150;IF([.C79]=6;375;IF([.C79]=7;750;0))))))" office:value-type="float" office:value="0" calcext:value-type="float">
            <text:p>0</text:p>
          </table:table-cell>
          <table:table-cell table:number-columns-repeated="2"/>
          <table:table-cell table:formula="of:=[.P79]*28+[.Q79]*22+[.R79]*100+[.S79]*18+[.T79]*35+[.U79]*22+[.V79]*100+[.W79]*18+[.X79]*80+[.Y79]*1100+[.Z79]*200+[.AA79]*100+[.AB79]*32+[.AC79]*1700+[.AD79]*850+[.AE79]*200+[.AF79]*400+[.AG79]*70+[.AH79]*300+[.AI79]*450+[.AJ79]*1100+[.AK79]*500+[.AL79]*60+[.AM79]*600+[.AN79]*20+[.AO79]*60+[.AP79]*20+[.AQ79]*100+[.AR79]*900+[.AS79]*1300+[.AT79]*2500+[.AU79]*900+[.AV79]*1200+[.AW79]*1500+[.AX79]*110+[.AY79]*130+[.AZ79]*50+[.BA79]*600+[.BB79]*5500+[.BC79]*70000+[.BD79]*90000" office:value-type="float" office:value="0" calcext:value-type="float">
            <text:p>0</text:p>
          </table:table-cell>
          <table:table-cell table:style-name="ce2" table:formula="of:=[.G79]-[.F79]" office:value-type="float" office:value="0" calcext:value-type="float">
            <text:p>0</text:p>
          </table:table-cell>
          <table:table-cell table:style-name="ce3" table:formula="of:=IF([.F79]=0;&quot;&quot;;[.G79]/[.F79])">
            <text:p/>
          </table:table-cell>
          <table:table-cell table:formula="of:=IF([.G79]=0;&quot;&quot;;[.E79]*[.F79]/[.G79])">
            <text:p/>
          </table:table-cell>
          <table:table-cell table:style-name="ce5"/>
          <table:table-cell table:formula="of:=[.D79]*[.K79]" office:value-type="float" office:value="0" calcext:value-type="float">
            <text:p>0</text:p>
          </table:table-cell>
          <table:table-cell table:formula="of:=[.F79]*[.K79]" office:value-type="float" office:value="0" calcext:value-type="float">
            <text:p>0</text:p>
          </table:table-cell>
          <table:table-cell table:style-name="ce6" table:formula="of:=[.H79]*[.K79]" office:value-type="float" office:value="0" calcext:value-type="float">
            <text:p>0</text:p>
          </table:table-cell>
          <table:table-cell table:formula="of:=[.G79]*[.K79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0]=2;15;IF([.C80]=3;37;IF([.C80]=4;75;IF([.C80]=5;150;IF([.C80]=6;375;IF([.C80]=7;750;0))))))" office:value-type="float" office:value="0" calcext:value-type="float">
            <text:p>0</text:p>
          </table:table-cell>
          <table:table-cell table:number-columns-repeated="2"/>
          <table:table-cell table:formula="of:=[.P80]*28+[.Q80]*22+[.R80]*100+[.S80]*18+[.T80]*35+[.U80]*22+[.V80]*100+[.W80]*18+[.X80]*80+[.Y80]*1100+[.Z80]*200+[.AA80]*100+[.AB80]*32+[.AC80]*1700+[.AD80]*850+[.AE80]*200+[.AF80]*400+[.AG80]*70+[.AH80]*300+[.AI80]*450+[.AJ80]*1100+[.AK80]*500+[.AL80]*60+[.AM80]*600+[.AN80]*20+[.AO80]*60+[.AP80]*20+[.AQ80]*100+[.AR80]*900+[.AS80]*1300+[.AT80]*2500+[.AU80]*900+[.AV80]*1200+[.AW80]*1500+[.AX80]*110+[.AY80]*130+[.AZ80]*50+[.BA80]*600+[.BB80]*5500+[.BC80]*70000+[.BD80]*90000" office:value-type="float" office:value="0" calcext:value-type="float">
            <text:p>0</text:p>
          </table:table-cell>
          <table:table-cell table:style-name="ce2" table:formula="of:=[.G80]-[.F80]" office:value-type="float" office:value="0" calcext:value-type="float">
            <text:p>0</text:p>
          </table:table-cell>
          <table:table-cell table:style-name="ce3" table:formula="of:=IF([.F80]=0;&quot;&quot;;[.G80]/[.F80])">
            <text:p/>
          </table:table-cell>
          <table:table-cell table:formula="of:=IF([.G80]=0;&quot;&quot;;[.E80]*[.F80]/[.G80])">
            <text:p/>
          </table:table-cell>
          <table:table-cell table:style-name="ce5"/>
          <table:table-cell table:formula="of:=[.D80]*[.K80]" office:value-type="float" office:value="0" calcext:value-type="float">
            <text:p>0</text:p>
          </table:table-cell>
          <table:table-cell table:formula="of:=[.F80]*[.K80]" office:value-type="float" office:value="0" calcext:value-type="float">
            <text:p>0</text:p>
          </table:table-cell>
          <table:table-cell table:style-name="ce6" table:formula="of:=[.H80]*[.K80]" office:value-type="float" office:value="0" calcext:value-type="float">
            <text:p>0</text:p>
          </table:table-cell>
          <table:table-cell table:formula="of:=[.G80]*[.K80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1]=2;15;IF([.C81]=3;37;IF([.C81]=4;75;IF([.C81]=5;150;IF([.C81]=6;375;IF([.C81]=7;750;0))))))" office:value-type="float" office:value="0" calcext:value-type="float">
            <text:p>0</text:p>
          </table:table-cell>
          <table:table-cell table:number-columns-repeated="2"/>
          <table:table-cell table:formula="of:=[.P81]*28+[.Q81]*22+[.R81]*100+[.S81]*18+[.T81]*35+[.U81]*22+[.V81]*100+[.W81]*18+[.X81]*80+[.Y81]*1100+[.Z81]*200+[.AA81]*100+[.AB81]*32+[.AC81]*1700+[.AD81]*850+[.AE81]*200+[.AF81]*400+[.AG81]*70+[.AH81]*300+[.AI81]*450+[.AJ81]*1100+[.AK81]*500+[.AL81]*60+[.AM81]*600+[.AN81]*20+[.AO81]*60+[.AP81]*20+[.AQ81]*100+[.AR81]*900+[.AS81]*1300+[.AT81]*2500+[.AU81]*900+[.AV81]*1200+[.AW81]*1500+[.AX81]*110+[.AY81]*130+[.AZ81]*50+[.BA81]*600+[.BB81]*5500+[.BC81]*70000+[.BD81]*90000" office:value-type="float" office:value="0" calcext:value-type="float">
            <text:p>0</text:p>
          </table:table-cell>
          <table:table-cell table:style-name="ce2" table:formula="of:=[.G81]-[.F81]" office:value-type="float" office:value="0" calcext:value-type="float">
            <text:p>0</text:p>
          </table:table-cell>
          <table:table-cell table:style-name="ce3" table:formula="of:=IF([.F81]=0;&quot;&quot;;[.G81]/[.F81])">
            <text:p/>
          </table:table-cell>
          <table:table-cell table:formula="of:=IF([.G81]=0;&quot;&quot;;[.E81]*[.F81]/[.G81])">
            <text:p/>
          </table:table-cell>
          <table:table-cell table:style-name="ce5"/>
          <table:table-cell table:formula="of:=[.D81]*[.K81]" office:value-type="float" office:value="0" calcext:value-type="float">
            <text:p>0</text:p>
          </table:table-cell>
          <table:table-cell table:formula="of:=[.F81]*[.K81]" office:value-type="float" office:value="0" calcext:value-type="float">
            <text:p>0</text:p>
          </table:table-cell>
          <table:table-cell table:style-name="ce6" table:formula="of:=[.H81]*[.K81]" office:value-type="float" office:value="0" calcext:value-type="float">
            <text:p>0</text:p>
          </table:table-cell>
          <table:table-cell table:formula="of:=[.G81]*[.K81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2]=2;15;IF([.C82]=3;37;IF([.C82]=4;75;IF([.C82]=5;150;IF([.C82]=6;375;IF([.C82]=7;750;0))))))" office:value-type="float" office:value="0" calcext:value-type="float">
            <text:p>0</text:p>
          </table:table-cell>
          <table:table-cell table:number-columns-repeated="2"/>
          <table:table-cell table:formula="of:=[.P82]*28+[.Q82]*22+[.R82]*100+[.S82]*18+[.T82]*35+[.U82]*22+[.V82]*100+[.W82]*18+[.X82]*80+[.Y82]*1100+[.Z82]*200+[.AA82]*100+[.AB82]*32+[.AC82]*1700+[.AD82]*850+[.AE82]*200+[.AF82]*400+[.AG82]*70+[.AH82]*300+[.AI82]*450+[.AJ82]*1100+[.AK82]*500+[.AL82]*60+[.AM82]*600+[.AN82]*20+[.AO82]*60+[.AP82]*20+[.AQ82]*100+[.AR82]*900+[.AS82]*1300+[.AT82]*2500+[.AU82]*900+[.AV82]*1200+[.AW82]*1500+[.AX82]*110+[.AY82]*130+[.AZ82]*50+[.BA82]*600+[.BB82]*5500+[.BC82]*70000+[.BD82]*90000" office:value-type="float" office:value="0" calcext:value-type="float">
            <text:p>0</text:p>
          </table:table-cell>
          <table:table-cell table:style-name="ce2" table:formula="of:=[.G82]-[.F82]" office:value-type="float" office:value="0" calcext:value-type="float">
            <text:p>0</text:p>
          </table:table-cell>
          <table:table-cell table:style-name="ce3" table:formula="of:=IF([.F82]=0;&quot;&quot;;[.G82]/[.F82])">
            <text:p/>
          </table:table-cell>
          <table:table-cell table:formula="of:=IF([.G82]=0;&quot;&quot;;[.E82]*[.F82]/[.G82])">
            <text:p/>
          </table:table-cell>
          <table:table-cell table:style-name="ce5"/>
          <table:table-cell table:formula="of:=[.D82]*[.K82]" office:value-type="float" office:value="0" calcext:value-type="float">
            <text:p>0</text:p>
          </table:table-cell>
          <table:table-cell table:formula="of:=[.F82]*[.K82]" office:value-type="float" office:value="0" calcext:value-type="float">
            <text:p>0</text:p>
          </table:table-cell>
          <table:table-cell table:style-name="ce6" table:formula="of:=[.H82]*[.K82]" office:value-type="float" office:value="0" calcext:value-type="float">
            <text:p>0</text:p>
          </table:table-cell>
          <table:table-cell table:formula="of:=[.G82]*[.K82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3]=2;15;IF([.C83]=3;37;IF([.C83]=4;75;IF([.C83]=5;150;IF([.C83]=6;375;IF([.C83]=7;750;0))))))" office:value-type="float" office:value="0" calcext:value-type="float">
            <text:p>0</text:p>
          </table:table-cell>
          <table:table-cell table:number-columns-repeated="2"/>
          <table:table-cell table:formula="of:=[.P83]*28+[.Q83]*22+[.R83]*100+[.S83]*18+[.T83]*35+[.U83]*22+[.V83]*100+[.W83]*18+[.X83]*80+[.Y83]*1100+[.Z83]*200+[.AA83]*100+[.AB83]*32+[.AC83]*1700+[.AD83]*850+[.AE83]*200+[.AF83]*400+[.AG83]*70+[.AH83]*300+[.AI83]*450+[.AJ83]*1100+[.AK83]*500+[.AL83]*60+[.AM83]*600+[.AN83]*20+[.AO83]*60+[.AP83]*20+[.AQ83]*100+[.AR83]*900+[.AS83]*1300+[.AT83]*2500+[.AU83]*900+[.AV83]*1200+[.AW83]*1500+[.AX83]*110+[.AY83]*130+[.AZ83]*50+[.BA83]*600+[.BB83]*5500+[.BC83]*70000+[.BD83]*90000" office:value-type="float" office:value="0" calcext:value-type="float">
            <text:p>0</text:p>
          </table:table-cell>
          <table:table-cell table:style-name="ce2" table:formula="of:=[.G83]-[.F83]" office:value-type="float" office:value="0" calcext:value-type="float">
            <text:p>0</text:p>
          </table:table-cell>
          <table:table-cell table:style-name="ce3" table:formula="of:=IF([.F83]=0;&quot;&quot;;[.G83]/[.F83])">
            <text:p/>
          </table:table-cell>
          <table:table-cell table:formula="of:=IF([.G83]=0;&quot;&quot;;[.E83]*[.F83]/[.G83])">
            <text:p/>
          </table:table-cell>
          <table:table-cell table:style-name="ce5"/>
          <table:table-cell table:formula="of:=[.D83]*[.K83]" office:value-type="float" office:value="0" calcext:value-type="float">
            <text:p>0</text:p>
          </table:table-cell>
          <table:table-cell table:formula="of:=[.F83]*[.K83]" office:value-type="float" office:value="0" calcext:value-type="float">
            <text:p>0</text:p>
          </table:table-cell>
          <table:table-cell table:style-name="ce6" table:formula="of:=[.H83]*[.K83]" office:value-type="float" office:value="0" calcext:value-type="float">
            <text:p>0</text:p>
          </table:table-cell>
          <table:table-cell table:formula="of:=[.G83]*[.K83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4]=2;15;IF([.C84]=3;37;IF([.C84]=4;75;IF([.C84]=5;150;IF([.C84]=6;375;IF([.C84]=7;750;0))))))" office:value-type="float" office:value="0" calcext:value-type="float">
            <text:p>0</text:p>
          </table:table-cell>
          <table:table-cell table:number-columns-repeated="2"/>
          <table:table-cell table:formula="of:=[.P84]*28+[.Q84]*22+[.R84]*100+[.S84]*18+[.T84]*35+[.U84]*22+[.V84]*100+[.W84]*18+[.X84]*80+[.Y84]*1100+[.Z84]*200+[.AA84]*100+[.AB84]*32+[.AC84]*1700+[.AD84]*850+[.AE84]*200+[.AF84]*400+[.AG84]*70+[.AH84]*300+[.AI84]*450+[.AJ84]*1100+[.AK84]*500+[.AL84]*60+[.AM84]*600+[.AN84]*20+[.AO84]*60+[.AP84]*20+[.AQ84]*100+[.AR84]*900+[.AS84]*1300+[.AT84]*2500+[.AU84]*900+[.AV84]*1200+[.AW84]*1500+[.AX84]*110+[.AY84]*130+[.AZ84]*50+[.BA84]*600+[.BB84]*5500+[.BC84]*70000+[.BD84]*90000" office:value-type="float" office:value="0" calcext:value-type="float">
            <text:p>0</text:p>
          </table:table-cell>
          <table:table-cell table:style-name="ce2" table:formula="of:=[.G84]-[.F84]" office:value-type="float" office:value="0" calcext:value-type="float">
            <text:p>0</text:p>
          </table:table-cell>
          <table:table-cell table:style-name="ce3" table:formula="of:=IF([.F84]=0;&quot;&quot;;[.G84]/[.F84])">
            <text:p/>
          </table:table-cell>
          <table:table-cell table:formula="of:=IF([.G84]=0;&quot;&quot;;[.E84]*[.F84]/[.G84])">
            <text:p/>
          </table:table-cell>
          <table:table-cell table:style-name="ce5"/>
          <table:table-cell table:formula="of:=[.D84]*[.K84]" office:value-type="float" office:value="0" calcext:value-type="float">
            <text:p>0</text:p>
          </table:table-cell>
          <table:table-cell table:formula="of:=[.F84]*[.K84]" office:value-type="float" office:value="0" calcext:value-type="float">
            <text:p>0</text:p>
          </table:table-cell>
          <table:table-cell table:style-name="ce6" table:formula="of:=[.H84]*[.K84]" office:value-type="float" office:value="0" calcext:value-type="float">
            <text:p>0</text:p>
          </table:table-cell>
          <table:table-cell table:formula="of:=[.G84]*[.K84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5]=2;15;IF([.C85]=3;37;IF([.C85]=4;75;IF([.C85]=5;150;IF([.C85]=6;375;IF([.C85]=7;750;0))))))" office:value-type="float" office:value="0" calcext:value-type="float">
            <text:p>0</text:p>
          </table:table-cell>
          <table:table-cell table:number-columns-repeated="2"/>
          <table:table-cell table:formula="of:=[.P85]*28+[.Q85]*22+[.R85]*100+[.S85]*18+[.T85]*35+[.U85]*22+[.V85]*100+[.W85]*18+[.X85]*80+[.Y85]*1100+[.Z85]*200+[.AA85]*100+[.AB85]*32+[.AC85]*1700+[.AD85]*850+[.AE85]*200+[.AF85]*400+[.AG85]*70+[.AH85]*300+[.AI85]*450+[.AJ85]*1100+[.AK85]*500+[.AL85]*60+[.AM85]*600+[.AN85]*20+[.AO85]*60+[.AP85]*20+[.AQ85]*100+[.AR85]*900+[.AS85]*1300+[.AT85]*2500+[.AU85]*900+[.AV85]*1200+[.AW85]*1500+[.AX85]*110+[.AY85]*130+[.AZ85]*50+[.BA85]*600+[.BB85]*5500+[.BC85]*70000+[.BD85]*90000" office:value-type="float" office:value="0" calcext:value-type="float">
            <text:p>0</text:p>
          </table:table-cell>
          <table:table-cell table:style-name="ce2" table:formula="of:=[.G85]-[.F85]" office:value-type="float" office:value="0" calcext:value-type="float">
            <text:p>0</text:p>
          </table:table-cell>
          <table:table-cell table:style-name="ce3" table:formula="of:=IF([.F85]=0;&quot;&quot;;[.G85]/[.F85])">
            <text:p/>
          </table:table-cell>
          <table:table-cell table:formula="of:=IF([.G85]=0;&quot;&quot;;[.E85]*[.F85]/[.G85])">
            <text:p/>
          </table:table-cell>
          <table:table-cell table:style-name="ce5"/>
          <table:table-cell table:formula="of:=[.D85]*[.K85]" office:value-type="float" office:value="0" calcext:value-type="float">
            <text:p>0</text:p>
          </table:table-cell>
          <table:table-cell table:formula="of:=[.F85]*[.K85]" office:value-type="float" office:value="0" calcext:value-type="float">
            <text:p>0</text:p>
          </table:table-cell>
          <table:table-cell table:style-name="ce6" table:formula="of:=[.H85]*[.K85]" office:value-type="float" office:value="0" calcext:value-type="float">
            <text:p>0</text:p>
          </table:table-cell>
          <table:table-cell table:formula="of:=[.G85]*[.K85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6]=2;15;IF([.C86]=3;37;IF([.C86]=4;75;IF([.C86]=5;150;IF([.C86]=6;375;IF([.C86]=7;750;0))))))" office:value-type="float" office:value="0" calcext:value-type="float">
            <text:p>0</text:p>
          </table:table-cell>
          <table:table-cell table:number-columns-repeated="2"/>
          <table:table-cell table:formula="of:=[.P86]*28+[.Q86]*22+[.R86]*100+[.S86]*18+[.T86]*35+[.U86]*22+[.V86]*100+[.W86]*18+[.X86]*80+[.Y86]*1100+[.Z86]*200+[.AA86]*100+[.AB86]*32+[.AC86]*1700+[.AD86]*850+[.AE86]*200+[.AF86]*400+[.AG86]*70+[.AH86]*300+[.AI86]*450+[.AJ86]*1100+[.AK86]*500+[.AL86]*60+[.AM86]*600+[.AN86]*20+[.AO86]*60+[.AP86]*20+[.AQ86]*100+[.AR86]*900+[.AS86]*1300+[.AT86]*2500+[.AU86]*900+[.AV86]*1200+[.AW86]*1500+[.AX86]*110+[.AY86]*130+[.AZ86]*50+[.BA86]*600+[.BB86]*5500+[.BC86]*70000+[.BD86]*90000" office:value-type="float" office:value="0" calcext:value-type="float">
            <text:p>0</text:p>
          </table:table-cell>
          <table:table-cell table:style-name="ce2" table:formula="of:=[.G86]-[.F86]" office:value-type="float" office:value="0" calcext:value-type="float">
            <text:p>0</text:p>
          </table:table-cell>
          <table:table-cell table:style-name="ce3" table:formula="of:=IF([.F86]=0;&quot;&quot;;[.G86]/[.F86])">
            <text:p/>
          </table:table-cell>
          <table:table-cell table:formula="of:=IF([.G86]=0;&quot;&quot;;[.E86]*[.F86]/[.G86])">
            <text:p/>
          </table:table-cell>
          <table:table-cell table:style-name="ce5"/>
          <table:table-cell table:formula="of:=[.D86]*[.K86]" office:value-type="float" office:value="0" calcext:value-type="float">
            <text:p>0</text:p>
          </table:table-cell>
          <table:table-cell table:formula="of:=[.F86]*[.K86]" office:value-type="float" office:value="0" calcext:value-type="float">
            <text:p>0</text:p>
          </table:table-cell>
          <table:table-cell table:style-name="ce6" table:formula="of:=[.H86]*[.K86]" office:value-type="float" office:value="0" calcext:value-type="float">
            <text:p>0</text:p>
          </table:table-cell>
          <table:table-cell table:formula="of:=[.G86]*[.K86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7]=2;15;IF([.C87]=3;37;IF([.C87]=4;75;IF([.C87]=5;150;IF([.C87]=6;375;IF([.C87]=7;750;0))))))" office:value-type="float" office:value="0" calcext:value-type="float">
            <text:p>0</text:p>
          </table:table-cell>
          <table:table-cell table:number-columns-repeated="2"/>
          <table:table-cell table:formula="of:=[.P87]*28+[.Q87]*22+[.R87]*100+[.S87]*18+[.T87]*35+[.U87]*22+[.V87]*100+[.W87]*18+[.X87]*80+[.Y87]*1100+[.Z87]*200+[.AA87]*100+[.AB87]*32+[.AC87]*1700+[.AD87]*850+[.AE87]*200+[.AF87]*400+[.AG87]*70+[.AH87]*300+[.AI87]*450+[.AJ87]*1100+[.AK87]*500+[.AL87]*60+[.AM87]*600+[.AN87]*20+[.AO87]*60+[.AP87]*20+[.AQ87]*100+[.AR87]*900+[.AS87]*1300+[.AT87]*2500+[.AU87]*900+[.AV87]*1200+[.AW87]*1500+[.AX87]*110+[.AY87]*130+[.AZ87]*50+[.BA87]*600+[.BB87]*5500+[.BC87]*70000+[.BD87]*90000" office:value-type="float" office:value="0" calcext:value-type="float">
            <text:p>0</text:p>
          </table:table-cell>
          <table:table-cell table:style-name="ce2" table:formula="of:=[.G87]-[.F87]" office:value-type="float" office:value="0" calcext:value-type="float">
            <text:p>0</text:p>
          </table:table-cell>
          <table:table-cell table:style-name="ce3" table:formula="of:=IF([.F87]=0;&quot;&quot;;[.G87]/[.F87])">
            <text:p/>
          </table:table-cell>
          <table:table-cell table:formula="of:=IF([.G87]=0;&quot;&quot;;[.E87]*[.F87]/[.G87])">
            <text:p/>
          </table:table-cell>
          <table:table-cell table:style-name="ce5"/>
          <table:table-cell table:formula="of:=[.D87]*[.K87]" office:value-type="float" office:value="0" calcext:value-type="float">
            <text:p>0</text:p>
          </table:table-cell>
          <table:table-cell table:formula="of:=[.F87]*[.K87]" office:value-type="float" office:value="0" calcext:value-type="float">
            <text:p>0</text:p>
          </table:table-cell>
          <table:table-cell table:style-name="ce6" table:formula="of:=[.H87]*[.K87]" office:value-type="float" office:value="0" calcext:value-type="float">
            <text:p>0</text:p>
          </table:table-cell>
          <table:table-cell table:formula="of:=[.G87]*[.K87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8]=2;15;IF([.C88]=3;37;IF([.C88]=4;75;IF([.C88]=5;150;IF([.C88]=6;375;IF([.C88]=7;750;0))))))" office:value-type="float" office:value="0" calcext:value-type="float">
            <text:p>0</text:p>
          </table:table-cell>
          <table:table-cell table:number-columns-repeated="2"/>
          <table:table-cell table:formula="of:=[.P88]*28+[.Q88]*22+[.R88]*100+[.S88]*18+[.T88]*35+[.U88]*22+[.V88]*100+[.W88]*18+[.X88]*80+[.Y88]*1100+[.Z88]*200+[.AA88]*100+[.AB88]*32+[.AC88]*1700+[.AD88]*850+[.AE88]*200+[.AF88]*400+[.AG88]*70+[.AH88]*300+[.AI88]*450+[.AJ88]*1100+[.AK88]*500+[.AL88]*60+[.AM88]*600+[.AN88]*20+[.AO88]*60+[.AP88]*20+[.AQ88]*100+[.AR88]*900+[.AS88]*1300+[.AT88]*2500+[.AU88]*900+[.AV88]*1200+[.AW88]*1500+[.AX88]*110+[.AY88]*130+[.AZ88]*50+[.BA88]*600+[.BB88]*5500+[.BC88]*70000+[.BD88]*90000" office:value-type="float" office:value="0" calcext:value-type="float">
            <text:p>0</text:p>
          </table:table-cell>
          <table:table-cell table:style-name="ce2" table:formula="of:=[.G88]-[.F88]" office:value-type="float" office:value="0" calcext:value-type="float">
            <text:p>0</text:p>
          </table:table-cell>
          <table:table-cell table:style-name="ce3" table:formula="of:=IF([.F88]=0;&quot;&quot;;[.G88]/[.F88])">
            <text:p/>
          </table:table-cell>
          <table:table-cell table:formula="of:=IF([.G88]=0;&quot;&quot;;[.E88]*[.F88]/[.G88])">
            <text:p/>
          </table:table-cell>
          <table:table-cell table:style-name="ce5"/>
          <table:table-cell table:formula="of:=[.D88]*[.K88]" office:value-type="float" office:value="0" calcext:value-type="float">
            <text:p>0</text:p>
          </table:table-cell>
          <table:table-cell table:formula="of:=[.F88]*[.K88]" office:value-type="float" office:value="0" calcext:value-type="float">
            <text:p>0</text:p>
          </table:table-cell>
          <table:table-cell table:style-name="ce6" table:formula="of:=[.H88]*[.K88]" office:value-type="float" office:value="0" calcext:value-type="float">
            <text:p>0</text:p>
          </table:table-cell>
          <table:table-cell table:formula="of:=[.G88]*[.K88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89]=2;15;IF([.C89]=3;37;IF([.C89]=4;75;IF([.C89]=5;150;IF([.C89]=6;375;IF([.C89]=7;750;0))))))" office:value-type="float" office:value="0" calcext:value-type="float">
            <text:p>0</text:p>
          </table:table-cell>
          <table:table-cell table:number-columns-repeated="2"/>
          <table:table-cell table:formula="of:=[.P89]*28+[.Q89]*22+[.R89]*100+[.S89]*18+[.T89]*35+[.U89]*22+[.V89]*100+[.W89]*18+[.X89]*80+[.Y89]*1100+[.Z89]*200+[.AA89]*100+[.AB89]*32+[.AC89]*1700+[.AD89]*850+[.AE89]*200+[.AF89]*400+[.AG89]*70+[.AH89]*300+[.AI89]*450+[.AJ89]*1100+[.AK89]*500+[.AL89]*60+[.AM89]*600+[.AN89]*20+[.AO89]*60+[.AP89]*20+[.AQ89]*100+[.AR89]*900+[.AS89]*1300+[.AT89]*2500+[.AU89]*900+[.AV89]*1200+[.AW89]*1500+[.AX89]*110+[.AY89]*130+[.AZ89]*50+[.BA89]*600+[.BB89]*5500+[.BC89]*70000+[.BD89]*90000" office:value-type="float" office:value="0" calcext:value-type="float">
            <text:p>0</text:p>
          </table:table-cell>
          <table:table-cell table:style-name="ce2" table:formula="of:=[.G89]-[.F89]" office:value-type="float" office:value="0" calcext:value-type="float">
            <text:p>0</text:p>
          </table:table-cell>
          <table:table-cell table:style-name="ce3" table:formula="of:=IF([.F89]=0;&quot;&quot;;[.G89]/[.F89])">
            <text:p/>
          </table:table-cell>
          <table:table-cell table:formula="of:=IF([.G89]=0;&quot;&quot;;[.E89]*[.F89]/[.G89])">
            <text:p/>
          </table:table-cell>
          <table:table-cell table:style-name="ce5"/>
          <table:table-cell table:formula="of:=[.D89]*[.K89]" office:value-type="float" office:value="0" calcext:value-type="float">
            <text:p>0</text:p>
          </table:table-cell>
          <table:table-cell table:formula="of:=[.F89]*[.K89]" office:value-type="float" office:value="0" calcext:value-type="float">
            <text:p>0</text:p>
          </table:table-cell>
          <table:table-cell table:style-name="ce6" table:formula="of:=[.H89]*[.K89]" office:value-type="float" office:value="0" calcext:value-type="float">
            <text:p>0</text:p>
          </table:table-cell>
          <table:table-cell table:formula="of:=[.G89]*[.K89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0]=2;15;IF([.C90]=3;37;IF([.C90]=4;75;IF([.C90]=5;150;IF([.C90]=6;375;IF([.C90]=7;750;0))))))" office:value-type="float" office:value="0" calcext:value-type="float">
            <text:p>0</text:p>
          </table:table-cell>
          <table:table-cell table:number-columns-repeated="2"/>
          <table:table-cell table:formula="of:=[.P90]*28+[.Q90]*22+[.R90]*100+[.S90]*18+[.T90]*35+[.U90]*22+[.V90]*100+[.W90]*18+[.X90]*80+[.Y90]*1100+[.Z90]*200+[.AA90]*100+[.AB90]*32+[.AC90]*1700+[.AD90]*850+[.AE90]*200+[.AF90]*400+[.AG90]*70+[.AH90]*300+[.AI90]*450+[.AJ90]*1100+[.AK90]*500+[.AL90]*60+[.AM90]*600+[.AN90]*20+[.AO90]*60+[.AP90]*20+[.AQ90]*100+[.AR90]*900+[.AS90]*1300+[.AT90]*2500+[.AU90]*900+[.AV90]*1200+[.AW90]*1500+[.AX90]*110+[.AY90]*130+[.AZ90]*50+[.BA90]*600+[.BB90]*5500+[.BC90]*70000+[.BD90]*90000" office:value-type="float" office:value="0" calcext:value-type="float">
            <text:p>0</text:p>
          </table:table-cell>
          <table:table-cell table:style-name="ce2" table:formula="of:=[.G90]-[.F90]" office:value-type="float" office:value="0" calcext:value-type="float">
            <text:p>0</text:p>
          </table:table-cell>
          <table:table-cell table:style-name="ce3" table:formula="of:=IF([.F90]=0;&quot;&quot;;[.G90]/[.F90])">
            <text:p/>
          </table:table-cell>
          <table:table-cell table:formula="of:=IF([.G90]=0;&quot;&quot;;[.E90]*[.F90]/[.G90])">
            <text:p/>
          </table:table-cell>
          <table:table-cell table:style-name="ce5"/>
          <table:table-cell table:formula="of:=[.D90]*[.K90]" office:value-type="float" office:value="0" calcext:value-type="float">
            <text:p>0</text:p>
          </table:table-cell>
          <table:table-cell table:formula="of:=[.F90]*[.K90]" office:value-type="float" office:value="0" calcext:value-type="float">
            <text:p>0</text:p>
          </table:table-cell>
          <table:table-cell table:style-name="ce6" table:formula="of:=[.H90]*[.K90]" office:value-type="float" office:value="0" calcext:value-type="float">
            <text:p>0</text:p>
          </table:table-cell>
          <table:table-cell table:formula="of:=[.G90]*[.K90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1]=2;15;IF([.C91]=3;37;IF([.C91]=4;75;IF([.C91]=5;150;IF([.C91]=6;375;IF([.C91]=7;750;0))))))" office:value-type="float" office:value="0" calcext:value-type="float">
            <text:p>0</text:p>
          </table:table-cell>
          <table:table-cell table:number-columns-repeated="2"/>
          <table:table-cell table:formula="of:=[.P91]*28+[.Q91]*22+[.R91]*100+[.S91]*18+[.T91]*35+[.U91]*22+[.V91]*100+[.W91]*18+[.X91]*80+[.Y91]*1100+[.Z91]*200+[.AA91]*100+[.AB91]*32+[.AC91]*1700+[.AD91]*850+[.AE91]*200+[.AF91]*400+[.AG91]*70+[.AH91]*300+[.AI91]*450+[.AJ91]*1100+[.AK91]*500+[.AL91]*60+[.AM91]*600+[.AN91]*20+[.AO91]*60+[.AP91]*20+[.AQ91]*100+[.AR91]*900+[.AS91]*1300+[.AT91]*2500+[.AU91]*900+[.AV91]*1200+[.AW91]*1500+[.AX91]*110+[.AY91]*130+[.AZ91]*50+[.BA91]*600+[.BB91]*5500+[.BC91]*70000+[.BD91]*90000" office:value-type="float" office:value="0" calcext:value-type="float">
            <text:p>0</text:p>
          </table:table-cell>
          <table:table-cell table:style-name="ce2" table:formula="of:=[.G91]-[.F91]" office:value-type="float" office:value="0" calcext:value-type="float">
            <text:p>0</text:p>
          </table:table-cell>
          <table:table-cell table:style-name="ce3" table:formula="of:=IF([.F91]=0;&quot;&quot;;[.G91]/[.F91])">
            <text:p/>
          </table:table-cell>
          <table:table-cell table:formula="of:=IF([.G91]=0;&quot;&quot;;[.E91]*[.F91]/[.G91])">
            <text:p/>
          </table:table-cell>
          <table:table-cell table:style-name="ce5"/>
          <table:table-cell table:formula="of:=[.D91]*[.K91]" office:value-type="float" office:value="0" calcext:value-type="float">
            <text:p>0</text:p>
          </table:table-cell>
          <table:table-cell table:formula="of:=[.F91]*[.K91]" office:value-type="float" office:value="0" calcext:value-type="float">
            <text:p>0</text:p>
          </table:table-cell>
          <table:table-cell table:style-name="ce6" table:formula="of:=[.H91]*[.K91]" office:value-type="float" office:value="0" calcext:value-type="float">
            <text:p>0</text:p>
          </table:table-cell>
          <table:table-cell table:formula="of:=[.G91]*[.K91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2]=2;15;IF([.C92]=3;37;IF([.C92]=4;75;IF([.C92]=5;150;IF([.C92]=6;375;IF([.C92]=7;750;0))))))" office:value-type="float" office:value="0" calcext:value-type="float">
            <text:p>0</text:p>
          </table:table-cell>
          <table:table-cell table:number-columns-repeated="2"/>
          <table:table-cell table:formula="of:=[.P92]*28+[.Q92]*22+[.R92]*100+[.S92]*18+[.T92]*35+[.U92]*22+[.V92]*100+[.W92]*18+[.X92]*80+[.Y92]*1100+[.Z92]*200+[.AA92]*100+[.AB92]*32+[.AC92]*1700+[.AD92]*850+[.AE92]*200+[.AF92]*400+[.AG92]*70+[.AH92]*300+[.AI92]*450+[.AJ92]*1100+[.AK92]*500+[.AL92]*60+[.AM92]*600+[.AN92]*20+[.AO92]*60+[.AP92]*20+[.AQ92]*100+[.AR92]*900+[.AS92]*1300+[.AT92]*2500+[.AU92]*900+[.AV92]*1200+[.AW92]*1500+[.AX92]*110+[.AY92]*130+[.AZ92]*50+[.BA92]*600+[.BB92]*5500+[.BC92]*70000+[.BD92]*90000" office:value-type="float" office:value="0" calcext:value-type="float">
            <text:p>0</text:p>
          </table:table-cell>
          <table:table-cell table:style-name="ce2" table:formula="of:=[.G92]-[.F92]" office:value-type="float" office:value="0" calcext:value-type="float">
            <text:p>0</text:p>
          </table:table-cell>
          <table:table-cell table:style-name="ce3" table:formula="of:=IF([.F92]=0;&quot;&quot;;[.G92]/[.F92])">
            <text:p/>
          </table:table-cell>
          <table:table-cell table:formula="of:=IF([.G92]=0;&quot;&quot;;[.E92]*[.F92]/[.G92])">
            <text:p/>
          </table:table-cell>
          <table:table-cell table:style-name="ce5"/>
          <table:table-cell table:formula="of:=[.D92]*[.K92]" office:value-type="float" office:value="0" calcext:value-type="float">
            <text:p>0</text:p>
          </table:table-cell>
          <table:table-cell table:formula="of:=[.F92]*[.K92]" office:value-type="float" office:value="0" calcext:value-type="float">
            <text:p>0</text:p>
          </table:table-cell>
          <table:table-cell table:style-name="ce6" table:formula="of:=[.H92]*[.K92]" office:value-type="float" office:value="0" calcext:value-type="float">
            <text:p>0</text:p>
          </table:table-cell>
          <table:table-cell table:formula="of:=[.G92]*[.K92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3]=2;15;IF([.C93]=3;37;IF([.C93]=4;75;IF([.C93]=5;150;IF([.C93]=6;375;IF([.C93]=7;750;0))))))" office:value-type="float" office:value="0" calcext:value-type="float">
            <text:p>0</text:p>
          </table:table-cell>
          <table:table-cell table:number-columns-repeated="2"/>
          <table:table-cell table:formula="of:=[.P93]*28+[.Q93]*22+[.R93]*100+[.S93]*18+[.T93]*35+[.U93]*22+[.V93]*100+[.W93]*18+[.X93]*80+[.Y93]*1100+[.Z93]*200+[.AA93]*100+[.AB93]*32+[.AC93]*1700+[.AD93]*850+[.AE93]*200+[.AF93]*400+[.AG93]*70+[.AH93]*300+[.AI93]*450+[.AJ93]*1100+[.AK93]*500+[.AL93]*60+[.AM93]*600+[.AN93]*20+[.AO93]*60+[.AP93]*20+[.AQ93]*100+[.AR93]*900+[.AS93]*1300+[.AT93]*2500+[.AU93]*900+[.AV93]*1200+[.AW93]*1500+[.AX93]*110+[.AY93]*130+[.AZ93]*50+[.BA93]*600+[.BB93]*5500+[.BC93]*70000+[.BD93]*90000" office:value-type="float" office:value="0" calcext:value-type="float">
            <text:p>0</text:p>
          </table:table-cell>
          <table:table-cell table:style-name="ce2" table:formula="of:=[.G93]-[.F93]" office:value-type="float" office:value="0" calcext:value-type="float">
            <text:p>0</text:p>
          </table:table-cell>
          <table:table-cell table:style-name="ce3" table:formula="of:=IF([.F93]=0;&quot;&quot;;[.G93]/[.F93])">
            <text:p/>
          </table:table-cell>
          <table:table-cell table:formula="of:=IF([.G93]=0;&quot;&quot;;[.E93]*[.F93]/[.G93])">
            <text:p/>
          </table:table-cell>
          <table:table-cell table:style-name="ce5"/>
          <table:table-cell table:formula="of:=[.D93]*[.K93]" office:value-type="float" office:value="0" calcext:value-type="float">
            <text:p>0</text:p>
          </table:table-cell>
          <table:table-cell table:formula="of:=[.F93]*[.K93]" office:value-type="float" office:value="0" calcext:value-type="float">
            <text:p>0</text:p>
          </table:table-cell>
          <table:table-cell table:style-name="ce6" table:formula="of:=[.H93]*[.K93]" office:value-type="float" office:value="0" calcext:value-type="float">
            <text:p>0</text:p>
          </table:table-cell>
          <table:table-cell table:formula="of:=[.G93]*[.K93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4]=2;15;IF([.C94]=3;37;IF([.C94]=4;75;IF([.C94]=5;150;IF([.C94]=6;375;IF([.C94]=7;750;0))))))" office:value-type="float" office:value="0" calcext:value-type="float">
            <text:p>0</text:p>
          </table:table-cell>
          <table:table-cell table:number-columns-repeated="2"/>
          <table:table-cell table:formula="of:=[.P94]*28+[.Q94]*22+[.R94]*100+[.S94]*18+[.T94]*35+[.U94]*22+[.V94]*100+[.W94]*18+[.X94]*80+[.Y94]*1100+[.Z94]*200+[.AA94]*100+[.AB94]*32+[.AC94]*1700+[.AD94]*850+[.AE94]*200+[.AF94]*400+[.AG94]*70+[.AH94]*300+[.AI94]*450+[.AJ94]*1100+[.AK94]*500+[.AL94]*60+[.AM94]*600+[.AN94]*20+[.AO94]*60+[.AP94]*20+[.AQ94]*100+[.AR94]*900+[.AS94]*1300+[.AT94]*2500+[.AU94]*900+[.AV94]*1200+[.AW94]*1500+[.AX94]*110+[.AY94]*130+[.AZ94]*50+[.BA94]*600+[.BB94]*5500+[.BC94]*70000+[.BD94]*90000" office:value-type="float" office:value="0" calcext:value-type="float">
            <text:p>0</text:p>
          </table:table-cell>
          <table:table-cell table:style-name="ce2" table:formula="of:=[.G94]-[.F94]" office:value-type="float" office:value="0" calcext:value-type="float">
            <text:p>0</text:p>
          </table:table-cell>
          <table:table-cell table:style-name="ce3" table:formula="of:=IF([.F94]=0;&quot;&quot;;[.G94]/[.F94])">
            <text:p/>
          </table:table-cell>
          <table:table-cell table:formula="of:=IF([.G94]=0;&quot;&quot;;[.E94]*[.F94]/[.G94])">
            <text:p/>
          </table:table-cell>
          <table:table-cell table:style-name="ce5"/>
          <table:table-cell table:formula="of:=[.D94]*[.K94]" office:value-type="float" office:value="0" calcext:value-type="float">
            <text:p>0</text:p>
          </table:table-cell>
          <table:table-cell table:formula="of:=[.F94]*[.K94]" office:value-type="float" office:value="0" calcext:value-type="float">
            <text:p>0</text:p>
          </table:table-cell>
          <table:table-cell table:style-name="ce6" table:formula="of:=[.H94]*[.K94]" office:value-type="float" office:value="0" calcext:value-type="float">
            <text:p>0</text:p>
          </table:table-cell>
          <table:table-cell table:formula="of:=[.G94]*[.K94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5]=2;15;IF([.C95]=3;37;IF([.C95]=4;75;IF([.C95]=5;150;IF([.C95]=6;375;IF([.C95]=7;750;0))))))" office:value-type="float" office:value="0" calcext:value-type="float">
            <text:p>0</text:p>
          </table:table-cell>
          <table:table-cell table:number-columns-repeated="2"/>
          <table:table-cell table:formula="of:=[.P95]*28+[.Q95]*22+[.R95]*100+[.S95]*18+[.T95]*35+[.U95]*22+[.V95]*100+[.W95]*18+[.X95]*80+[.Y95]*1100+[.Z95]*200+[.AA95]*100+[.AB95]*32+[.AC95]*1700+[.AD95]*850+[.AE95]*200+[.AF95]*400+[.AG95]*70+[.AH95]*300+[.AI95]*450+[.AJ95]*1100+[.AK95]*500+[.AL95]*60+[.AM95]*600+[.AN95]*20+[.AO95]*60+[.AP95]*20+[.AQ95]*100+[.AR95]*900+[.AS95]*1300+[.AT95]*2500+[.AU95]*900+[.AV95]*1200+[.AW95]*1500+[.AX95]*110+[.AY95]*130+[.AZ95]*50+[.BA95]*600+[.BB95]*5500+[.BC95]*70000+[.BD95]*90000" office:value-type="float" office:value="0" calcext:value-type="float">
            <text:p>0</text:p>
          </table:table-cell>
          <table:table-cell table:style-name="ce2" table:formula="of:=[.G95]-[.F95]" office:value-type="float" office:value="0" calcext:value-type="float">
            <text:p>0</text:p>
          </table:table-cell>
          <table:table-cell table:style-name="ce3" table:formula="of:=IF([.F95]=0;&quot;&quot;;[.G95]/[.F95])">
            <text:p/>
          </table:table-cell>
          <table:table-cell table:formula="of:=IF([.G95]=0;&quot;&quot;;[.E95]*[.F95]/[.G95])">
            <text:p/>
          </table:table-cell>
          <table:table-cell table:style-name="ce5"/>
          <table:table-cell table:formula="of:=[.D95]*[.K95]" office:value-type="float" office:value="0" calcext:value-type="float">
            <text:p>0</text:p>
          </table:table-cell>
          <table:table-cell table:formula="of:=[.F95]*[.K95]" office:value-type="float" office:value="0" calcext:value-type="float">
            <text:p>0</text:p>
          </table:table-cell>
          <table:table-cell table:style-name="ce6" table:formula="of:=[.H95]*[.K95]" office:value-type="float" office:value="0" calcext:value-type="float">
            <text:p>0</text:p>
          </table:table-cell>
          <table:table-cell table:formula="of:=[.G95]*[.K95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6]=2;15;IF([.C96]=3;37;IF([.C96]=4;75;IF([.C96]=5;150;IF([.C96]=6;375;IF([.C96]=7;750;0))))))" office:value-type="float" office:value="0" calcext:value-type="float">
            <text:p>0</text:p>
          </table:table-cell>
          <table:table-cell table:number-columns-repeated="2"/>
          <table:table-cell table:formula="of:=[.P96]*28+[.Q96]*22+[.R96]*100+[.S96]*18+[.T96]*35+[.U96]*22+[.V96]*100+[.W96]*18+[.X96]*80+[.Y96]*1100+[.Z96]*200+[.AA96]*100+[.AB96]*32+[.AC96]*1700+[.AD96]*850+[.AE96]*200+[.AF96]*400+[.AG96]*70+[.AH96]*300+[.AI96]*450+[.AJ96]*1100+[.AK96]*500+[.AL96]*60+[.AM96]*600+[.AN96]*20+[.AO96]*60+[.AP96]*20+[.AQ96]*100+[.AR96]*900+[.AS96]*1300+[.AT96]*2500+[.AU96]*900+[.AV96]*1200+[.AW96]*1500+[.AX96]*110+[.AY96]*130+[.AZ96]*50+[.BA96]*600+[.BB96]*5500+[.BC96]*70000+[.BD96]*90000" office:value-type="float" office:value="0" calcext:value-type="float">
            <text:p>0</text:p>
          </table:table-cell>
          <table:table-cell table:style-name="ce2" table:formula="of:=[.G96]-[.F96]" office:value-type="float" office:value="0" calcext:value-type="float">
            <text:p>0</text:p>
          </table:table-cell>
          <table:table-cell table:style-name="ce3" table:formula="of:=IF([.F96]=0;&quot;&quot;;[.G96]/[.F96])">
            <text:p/>
          </table:table-cell>
          <table:table-cell table:formula="of:=IF([.G96]=0;&quot;&quot;;[.E96]*[.F96]/[.G96])">
            <text:p/>
          </table:table-cell>
          <table:table-cell table:style-name="ce5"/>
          <table:table-cell table:formula="of:=[.D96]*[.K96]" office:value-type="float" office:value="0" calcext:value-type="float">
            <text:p>0</text:p>
          </table:table-cell>
          <table:table-cell table:formula="of:=[.F96]*[.K96]" office:value-type="float" office:value="0" calcext:value-type="float">
            <text:p>0</text:p>
          </table:table-cell>
          <table:table-cell table:style-name="ce6" table:formula="of:=[.H96]*[.K96]" office:value-type="float" office:value="0" calcext:value-type="float">
            <text:p>0</text:p>
          </table:table-cell>
          <table:table-cell table:formula="of:=[.G96]*[.K96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7]=2;15;IF([.C97]=3;37;IF([.C97]=4;75;IF([.C97]=5;150;IF([.C97]=6;375;IF([.C97]=7;750;0))))))" office:value-type="float" office:value="0" calcext:value-type="float">
            <text:p>0</text:p>
          </table:table-cell>
          <table:table-cell table:number-columns-repeated="2"/>
          <table:table-cell table:formula="of:=[.P97]*28+[.Q97]*22+[.R97]*100+[.S97]*18+[.T97]*35+[.U97]*22+[.V97]*100+[.W97]*18+[.X97]*80+[.Y97]*1100+[.Z97]*200+[.AA97]*100+[.AB97]*32+[.AC97]*1700+[.AD97]*850+[.AE97]*200+[.AF97]*400+[.AG97]*70+[.AH97]*300+[.AI97]*450+[.AJ97]*1100+[.AK97]*500+[.AL97]*60+[.AM97]*600+[.AN97]*20+[.AO97]*60+[.AP97]*20+[.AQ97]*100+[.AR97]*900+[.AS97]*1300+[.AT97]*2500+[.AU97]*900+[.AV97]*1200+[.AW97]*1500+[.AX97]*110+[.AY97]*130+[.AZ97]*50+[.BA97]*600+[.BB97]*5500+[.BC97]*70000+[.BD97]*90000" office:value-type="float" office:value="0" calcext:value-type="float">
            <text:p>0</text:p>
          </table:table-cell>
          <table:table-cell table:style-name="ce2" table:formula="of:=[.G97]-[.F97]" office:value-type="float" office:value="0" calcext:value-type="float">
            <text:p>0</text:p>
          </table:table-cell>
          <table:table-cell table:style-name="ce3" table:formula="of:=IF([.F97]=0;&quot;&quot;;[.G97]/[.F97])">
            <text:p/>
          </table:table-cell>
          <table:table-cell table:formula="of:=IF([.G97]=0;&quot;&quot;;[.E97]*[.F97]/[.G97])">
            <text:p/>
          </table:table-cell>
          <table:table-cell table:style-name="ce5"/>
          <table:table-cell table:formula="of:=[.D97]*[.K97]" office:value-type="float" office:value="0" calcext:value-type="float">
            <text:p>0</text:p>
          </table:table-cell>
          <table:table-cell table:formula="of:=[.F97]*[.K97]" office:value-type="float" office:value="0" calcext:value-type="float">
            <text:p>0</text:p>
          </table:table-cell>
          <table:table-cell table:style-name="ce6" table:formula="of:=[.H97]*[.K97]" office:value-type="float" office:value="0" calcext:value-type="float">
            <text:p>0</text:p>
          </table:table-cell>
          <table:table-cell table:formula="of:=[.G97]*[.K97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8]=2;15;IF([.C98]=3;37;IF([.C98]=4;75;IF([.C98]=5;150;IF([.C98]=6;375;IF([.C98]=7;750;0))))))" office:value-type="float" office:value="0" calcext:value-type="float">
            <text:p>0</text:p>
          </table:table-cell>
          <table:table-cell table:number-columns-repeated="2"/>
          <table:table-cell table:formula="of:=[.P98]*28+[.Q98]*22+[.R98]*100+[.S98]*18+[.T98]*35+[.U98]*22+[.V98]*100+[.W98]*18+[.X98]*80+[.Y98]*1100+[.Z98]*200+[.AA98]*100+[.AB98]*32+[.AC98]*1700+[.AD98]*850+[.AE98]*200+[.AF98]*400+[.AG98]*70+[.AH98]*300+[.AI98]*450+[.AJ98]*1100+[.AK98]*500+[.AL98]*60+[.AM98]*600+[.AN98]*20+[.AO98]*60+[.AP98]*20+[.AQ98]*100+[.AR98]*900+[.AS98]*1300+[.AT98]*2500+[.AU98]*900+[.AV98]*1200+[.AW98]*1500+[.AX98]*110+[.AY98]*130+[.AZ98]*50+[.BA98]*600+[.BB98]*5500+[.BC98]*70000+[.BD98]*90000" office:value-type="float" office:value="0" calcext:value-type="float">
            <text:p>0</text:p>
          </table:table-cell>
          <table:table-cell table:style-name="ce2" table:formula="of:=[.G98]-[.F98]" office:value-type="float" office:value="0" calcext:value-type="float">
            <text:p>0</text:p>
          </table:table-cell>
          <table:table-cell table:style-name="ce3" table:formula="of:=IF([.F98]=0;&quot;&quot;;[.G98]/[.F98])">
            <text:p/>
          </table:table-cell>
          <table:table-cell table:formula="of:=IF([.G98]=0;&quot;&quot;;[.E98]*[.F98]/[.G98])">
            <text:p/>
          </table:table-cell>
          <table:table-cell table:style-name="ce5"/>
          <table:table-cell table:formula="of:=[.D98]*[.K98]" office:value-type="float" office:value="0" calcext:value-type="float">
            <text:p>0</text:p>
          </table:table-cell>
          <table:table-cell table:formula="of:=[.F98]*[.K98]" office:value-type="float" office:value="0" calcext:value-type="float">
            <text:p>0</text:p>
          </table:table-cell>
          <table:table-cell table:style-name="ce6" table:formula="of:=[.H98]*[.K98]" office:value-type="float" office:value="0" calcext:value-type="float">
            <text:p>0</text:p>
          </table:table-cell>
          <table:table-cell table:formula="of:=[.G98]*[.K98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3"/>
          <table:table-cell table:formula="of:=IF([.C99]=2;15;IF([.C99]=3;37;IF([.C99]=4;75;IF([.C99]=5;150;IF([.C99]=6;375;IF([.C99]=7;750;0))))))" office:value-type="float" office:value="0" calcext:value-type="float">
            <text:p>0</text:p>
          </table:table-cell>
          <table:table-cell table:number-columns-repeated="2"/>
          <table:table-cell table:formula="of:=[.P99]*28+[.Q99]*22+[.R99]*100+[.S99]*18+[.T99]*35+[.U99]*22+[.V99]*100+[.W99]*18+[.X99]*80+[.Y99]*1100+[.Z99]*200+[.AA99]*100+[.AB99]*32+[.AC99]*1700+[.AD99]*850+[.AE99]*200+[.AF99]*400+[.AG99]*70+[.AH99]*300+[.AI99]*450+[.AJ99]*1100+[.AK99]*500+[.AL99]*60+[.AM99]*600+[.AN99]*20+[.AO99]*60+[.AP99]*20+[.AQ99]*100+[.AR99]*900+[.AS99]*1300+[.AT99]*2500+[.AU99]*900+[.AV99]*1200+[.AW99]*1500+[.AX99]*110+[.AY99]*130+[.AZ99]*50+[.BA99]*600+[.BB99]*5500+[.BC99]*70000+[.BD99]*90000" office:value-type="float" office:value="0" calcext:value-type="float">
            <text:p>0</text:p>
          </table:table-cell>
          <table:table-cell table:style-name="ce2" table:formula="of:=[.G99]-[.F99]" office:value-type="float" office:value="0" calcext:value-type="float">
            <text:p>0</text:p>
          </table:table-cell>
          <table:table-cell table:style-name="ce3" table:formula="of:=IF([.F99]=0;&quot;&quot;;[.G99]/[.F99])">
            <text:p/>
          </table:table-cell>
          <table:table-cell table:formula="of:=IF([.G99]=0;&quot;&quot;;[.E99]*[.F99]/[.G99])">
            <text:p/>
          </table:table-cell>
          <table:table-cell table:style-name="ce5"/>
          <table:table-cell table:formula="of:=[.D99]*[.K99]" office:value-type="float" office:value="0" calcext:value-type="float">
            <text:p>0</text:p>
          </table:table-cell>
          <table:table-cell table:formula="of:=[.F99]*[.K99]" office:value-type="float" office:value="0" calcext:value-type="float">
            <text:p>0</text:p>
          </table:table-cell>
          <table:table-cell table:style-name="ce6" table:formula="of:=[.H99]*[.K99]" office:value-type="float" office:value="0" calcext:value-type="float">
            <text:p>0</text:p>
          </table:table-cell>
          <table:table-cell table:formula="of:=[.G99]*[.K99]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>
          <table:table-cell table:number-columns-repeated="7"/>
          <table:table-cell table:style-name="ce2"/>
          <table:table-cell table:style-name="ce3"/>
          <table:table-cell/>
          <table:table-cell table:style-name="ce5"/>
          <table:table-cell table:number-columns-repeated="2"/>
          <table:table-cell table:style-name="ce6"/>
          <table:table-cell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7"/>
          <table:table-cell table:style-name="ce22"/>
          <table:table-cell table:style-name="ce23"/>
          <table:table-cell table:style-name="ce18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28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onnées.H3:Données.H100">
            <calcext:color-scale>
              <calcext:color-scale-entry calcext:value="-50000" calcext:type="number" calcext:color="#f8696b"/>
              <calcext:color-scale-entry calcext:value="0" calcext:type="number" calcext:color="#ffeb84"/>
              <calcext:color-scale-entry calcext:value="50000" calcext:type="number" calcext:color="#63be7b"/>
            </calcext:color-scale>
          </calcext:conditional-format>
          <calcext:conditional-format calcext:target-range-address="Données.I3:Données.I100">
            <calcext:color-scale>
              <calcext:color-scale-entry calcext:value="0.5" calcext:type="number" calcext:color="#f8696b"/>
              <calcext:color-scale-entry calcext:value="1" calcext:type="number" calcext:color="#ffeb84"/>
              <calcext:color-scale-entry calcext:value="1.5" calcext:type="number" calcext:color="#63be7b"/>
            </calcext:color-scale>
          </calcext:conditional-format>
          <calcext:conditional-format calcext:target-range-address="Données.N3:Données.N100">
            <calcext:color-scale>
              <calcext:color-scale-entry calcext:value="-500000" calcext:type="number" calcext:color="#f8696b"/>
              <calcext:color-scale-entry calcext:value="0" calcext:type="number" calcext:color="#ffeb84"/>
              <calcext:color-scale-entry calcext:value="500000" calcext:type="number" calcext:color="#63be7b"/>
            </calcext:color-scale>
          </calcext:conditional-format>
        </calcext:conditional-formats>
      </table:table>
      <table:table table:name="Résumé" table:style-name="ta2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Top 5 des items les plus rentabl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ntabilité</text:p>
          </table:table-cell>
          <table:table-cell office:value-type="string" calcext:value-type="string">
            <text:p>Bénéfice Total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Statistiques général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tabilité moyenne</text:p>
          </table:table-cell>
          <table:table-cell table:formula="of:=AVERAGE([$Données.I3:.I100])" office:value-type="float" office:value="0.0681401785714286" calcext:value-type="float">
            <text:p>0,06814017857142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énéfice moyen</text:p>
          </table:table-cell>
          <table:table-cell table:formula="of:=AVERAGE([$Données.O3:.O100])" office:value-type="float" office:value="2476.44329896907" calcext:value-type="float">
            <text:p>2476,443298969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ût total cumulé</text:p>
          </table:table-cell>
          <table:table-cell table:formula="of:=SUM([$Données.M3:.M100])" office:value-type="float" office:value="2555000" calcext:value-type="float">
            <text:p>2555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P total cumulé</text:p>
          </table:table-cell>
          <table:table-cell table:formula="of:=SUM([$Données.L3:.L100])" office:value-type="float" office:value="6750" calcext:value-type="float">
            <text:p>6750</text:p>
          </table:table-cell>
          <table:table-cell table:number-columns-repeated="1638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ésumé" style:display-name="PageStyle_Résum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onnées" style:display-name="PageStyle_Donné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5-03-31T12:25:36</meta:creation-date>
    <dc:date>2025-03-31T12:25:36</dc:date>
    <meta:generator>LibreOffice/7.5.5.2$Windows_X86_64 LibreOffice_project/ca8fe7424262805f223b9a2334bc7181abbcbf5e</meta:generator>
    <meta:document-statistic meta:table-count="2" meta:cell-count="1204" meta:object-count="0"/>
    <meta:user-defined meta:name="AppVersion">3.0</meta:user-defined>
  </office:meta>
</office:document-meta>
</file>